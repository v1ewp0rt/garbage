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10000021BB8B1C728.png" manifest:media-type="image/png"/>
  <manifest:file-entry manifest:full-path="Pictures/10000001000002E10000021B5CE047DB.png" manifest:media-type="image/png"/>
  <manifest:file-entry manifest:full-path="Pictures/10000001000002E10000021BBA330F20.png" manifest:media-type="image/png"/>
  <manifest:file-entry manifest:full-path="Pictures/10000001000000E700000084CF9754BB.png" manifest:media-type="image/png"/>
  <manifest:file-entry manifest:full-path="Pictures/10000001000003BA0000031D1F65A1F7.png" manifest:media-type="image/png"/>
  <manifest:file-entry manifest:full-path="Pictures/10000001000000C000000094F9456029.png" manifest:media-type="image/png"/>
  <manifest:file-entry manifest:full-path="Pictures/10000001000002A5000000BECCBC9E44.png" manifest:media-type="image/png"/>
  <manifest:file-entry manifest:full-path="Pictures/100000010000006C000000996FA52C4C.png" manifest:media-type="image/png"/>
  <manifest:file-entry manifest:full-path="Pictures/100000010000033D00000090646342AE.png" manifest:media-type="image/png"/>
  <manifest:file-entry manifest:full-path="Pictures/100000010000007600000041E3E249F0.png" manifest:media-type="image/png"/>
  <manifest:file-entry manifest:full-path="Pictures/100000010000037A0000005626C2C43A.png" manifest:media-type="image/png"/>
  <manifest:file-entry manifest:full-path="Pictures/1000000100000245000000BB9D82CB57.png" manifest:media-type="image/png"/>
  <manifest:file-entry manifest:full-path="Pictures/10000001000003870000009C625A8996.png" manifest:media-type="image/png"/>
  <manifest:file-entry manifest:full-path="Pictures/100000010000015B000000650177F792.png" manifest:media-type="image/png"/>
  <manifest:file-entry manifest:full-path="Pictures/100000010000004100000043A1E86FA3.png" manifest:media-type="image/png"/>
  <manifest:file-entry manifest:full-path="Pictures/10000001000001B2000001D37E6385CC.png" manifest:media-type="image/png"/>
  <manifest:file-entry manifest:full-path="Pictures/10000001000001360000008AEDFD0C9D.png" manifest:media-type="image/png"/>
  <manifest:file-entry manifest:full-path="Pictures/10000001000002E40000031D1866E7FD.png" manifest:media-type="image/png"/>
  <manifest:file-entry manifest:full-path="Pictures/100000010000028E0000031DDF926FCE.png" manifest:media-type="image/png"/>
  <manifest:file-entry manifest:full-path="Pictures/10000001000002E10000021BCBA61703.png" manifest:media-type="image/png"/>
  <manifest:file-entry manifest:full-path="Pictures/10000001000002710000031D9DF4E782.png" manifest:media-type="image/png"/>
  <manifest:file-entry manifest:full-path="Pictures/10000001000001AA0000031DC66E9EB1.png" manifest:media-type="image/png"/>
  <manifest:file-entry manifest:full-path="Pictures/1000000000000185000001154B049EE3.png" manifest:media-type="image/png"/>
  <manifest:file-entry manifest:full-path="Pictures/10000001000002DF0000031D58E5C994.png" manifest:media-type="image/png"/>
  <manifest:file-entry manifest:full-path="Pictures/100000010000003D000000478F1BBD14.png" manifest:media-type="image/png"/>
  <manifest:file-entry manifest:full-path="Pictures/10000000000001600000011695E42CB4.png" manifest:media-type="image/png"/>
  <manifest:file-entry manifest:full-path="Pictures/1000000100000300000000BEE40FB752.png" manifest:media-type="image/png"/>
  <manifest:file-entry manifest:full-path="Pictures/10000001000001BE000001D382D83970.png" manifest:media-type="image/png"/>
  <manifest:file-entry manifest:full-path="Pictures/10000001000002360000031D74AD76F3.png" manifest:media-type="image/png"/>
  <manifest:file-entry manifest:full-path="Pictures/10000001000002580000031D820D45FB.png" manifest:media-type="image/png"/>
  <manifest:file-entry manifest:full-path="Pictures/10000001000002A8000000FA60D7D46A.png" manifest:media-type="image/png"/>
  <manifest:file-entry manifest:full-path="Pictures/100000010000016F000000F464E93977.png" manifest:media-type="image/png"/>
  <manifest:file-entry manifest:full-path="Pictures/100000010000006B0000007B99E31BFD.png" manifest:media-type="image/png"/>
  <manifest:file-entry manifest:full-path="Pictures/10000001000000670000008291E2533A.png" manifest:media-type="image/png"/>
  <manifest:file-entry manifest:full-path="Pictures/10000001000006AE000002427B239BAB.png" manifest:media-type="image/png"/>
  <manifest:file-entry manifest:full-path="Pictures/10000001000000B20000005A4A6EFFB3.png" manifest:media-type="image/png"/>
  <manifest:file-entry manifest:full-path="Pictures/10000001000005080000031D33A6DF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4.6632in" table:align="margins"/>
    </style:style>
    <style:style style:name="Table4.A" style:family="table-column">
      <style:table-column-properties style:column-width="0.3583in" style:rel-column-width="5037*"/>
    </style:style>
    <style:style style:name="Table4.C" style:family="table-column">
      <style:table-column-properties style:column-width="0.359in" style:rel-column-width="5047*"/>
    </style:style>
    <style:style style:name="Table4.M" style:family="table-column">
      <style:table-column-properties style:column-width="0.3597in" style:rel-column-width="505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M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M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3.4375in" fo:margin-left="0.3542in" fo:break-before="page" table:align="left" style:may-break-between-rows="true" table:border-model="collapsing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4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129">
      <style:table-cell-properties fo:background-color="transparent" fo:padding="0in" fo:border="none" style:writing-mode="page">
        <style:background-image/>
      </style:table-cell-properties>
    </style:style>
    <style:style style:name="Table1.6" style:family="table-row">
      <style:table-row-properties style:min-row-height="0.0764in"/>
    </style:style>
    <style:style style:name="Table1.7" style:family="table-row">
      <style:table-row-properties style:min-row-height="0.0708in"/>
    </style:style>
    <style:style style:name="Table1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7" style:family="table-cell" style:data-style-name="N129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 style:data-style-name="N129">
      <style:table-cell-properties fo:background-color="transparent" fo:padding="0in" fo:border="none" style:writing-mode="page">
        <style:background-image/>
      </style:table-cell-properties>
    </style:style>
    <style:style style:name="Table2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8" style:family="table-cell" style:data-style-name="N129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2.0632in" table:align="left" style:may-break-between-rows="true" table:border-model="collapsing"/>
    </style:style>
    <style:style style:name="Table3.A" style:family="table-column">
      <style:table-column-properties style:column-width="1.1764in"/>
    </style:style>
    <style:style style:name="Table3.B" style:family="table-column">
      <style:table-column-properties style:column-width="0.8868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2.6507in" table:align="left" style:may-break-between-rows="true" table:border-model="collapsing"/>
    </style:style>
    <style:style style:name="Table6.A" style:family="table-column">
      <style:table-column-properties style:column-width="0.9049in"/>
    </style:style>
    <style:style style:name="Table6.B" style:family="table-column">
      <style:table-column-properties style:column-width="0.859in"/>
    </style:style>
    <style:style style:name="Table6.C" style:family="table-column">
      <style:table-column-properties style:column-width="0.886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3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2.3771in" table:align="left" style:may-break-between-rows="true" table:border-model="collapsing"/>
    </style:style>
    <style:style style:name="Table5.A" style:family="table-column">
      <style:table-column-properties style:column-width="0.9049in"/>
    </style:style>
    <style:style style:name="Table5.B" style:family="table-column">
      <style:table-column-properties style:column-width="0.7014in"/>
    </style:style>
    <style:style style:name="Table5.C" style:family="table-column">
      <style:table-column-properties style:column-width="0.7708in"/>
    </style:style>
    <style:style style:name="Table5.1" style:family="table-row">
      <style:table-row-properties style:min-row-height="0.275in"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.5924in" table:align="left" style:may-break-between-rows="true" table:border-model="collapsing"/>
    </style:style>
    <style:style style:name="Table7.A" style:family="table-column">
      <style:table-column-properties style:column-width="0.9049in"/>
    </style:style>
    <style:style style:name="Table7.B" style:family="table-column">
      <style:table-column-properties style:column-width="0.6875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 style:data-style-name="N130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 style:data-style-name="N13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2.0604in" table:align="left" style:may-break-between-rows="true" table:border-model="collapsing"/>
    </style:style>
    <style:style style:name="Table9.A" style:family="table-column">
      <style:table-column-properties style:column-width="1.1806in"/>
    </style:style>
    <style:style style:name="Table9.B" style:family="table-column">
      <style:table-column-properties style:column-width="0.8799in"/>
    </style:style>
    <style:style style:name="Table9.1" style:family="table-row">
      <style:table-row-properties style:min-row-height="0.2903in" fo:keep-together="auto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style:min-row-height="0.2903in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2.6229in" table:align="left" style:may-break-between-rows="true" table:border-model="collapsing"/>
    </style:style>
    <style:style style:name="Table10.A" style:family="table-column">
      <style:table-column-properties style:column-width="0.8771in"/>
    </style:style>
    <style:style style:name="Table10.B" style:family="table-column">
      <style:table-column-properties style:column-width="0.859in"/>
    </style:style>
    <style:style style:name="Table10.C" style:family="table-column">
      <style:table-column-properties style:column-width="0.8868in"/>
    </style:style>
    <style:style style:name="Table10.1" style:family="table-row">
      <style:table-row-properties style:min-row-height="0.275in" fo:keep-together="auto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3" style:family="table-row">
      <style:table-row-properties style:min-row-height="0.275in"/>
    </style:style>
    <style:style style:name="Table10.4" style:family="table-row">
      <style:table-row-properties style:min-row-height="0.275in"/>
    </style:style>
    <style:style style:name="Table8" style:family="table">
      <style:table-properties style:width="2.6229in" table:align="left" style:may-break-between-rows="true" table:border-model="collapsing"/>
    </style:style>
    <style:style style:name="Table8.A" style:family="table-column">
      <style:table-column-properties style:column-width="0.8771in"/>
    </style:style>
    <style:style style:name="Table8.B" style:family="table-column">
      <style:table-column-properties style:column-width="0.859in"/>
    </style:style>
    <style:style style:name="Table8.C" style:family="table-column">
      <style:table-column-properties style:column-width="0.8868in"/>
    </style:style>
    <style:style style:name="Table8.1" style:family="table-row">
      <style:table-row-properties style:min-row-height="0.275in"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style:min-row-height="0.275in"/>
    </style:style>
    <style:style style:name="Table8.4" style:family="table-row">
      <style:table-row-properties style:min-row-height="0.275in"/>
    </style:style>
    <style:style style:name="Table8" style:family="table">
      <style:table-properties style:width="2.6229in" table:align="left" style:may-break-between-rows="true" table:border-model="collapsing"/>
    </style:style>
    <style:style style:name="Table8.A" style:family="table-column">
      <style:table-column-properties style:column-width="0.8771in"/>
    </style:style>
    <style:style style:name="Table8.B" style:family="table-column">
      <style:table-column-properties style:column-width="0.859in"/>
    </style:style>
    <style:style style:name="Table8.C" style:family="table-column">
      <style:table-column-properties style:column-width="0.8868in"/>
    </style:style>
    <style:style style:name="Table8.1" style:family="table-row">
      <style:table-row-properties style:min-row-height="0.275in"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style:min-row-height="0.275in"/>
    </style:style>
    <style:style style:name="Table8.4" style:family="table-row">
      <style:table-row-properties style:min-row-height="0.275in"/>
    </style:style>
    <style:style style:name="Table10" style:family="table">
      <style:table-properties style:width="2.6229in" table:align="left" style:may-break-between-rows="true" table:border-model="collapsing"/>
    </style:style>
    <style:style style:name="Table10.A" style:family="table-column">
      <style:table-column-properties style:column-width="0.8771in"/>
    </style:style>
    <style:style style:name="Table10.B" style:family="table-column">
      <style:table-column-properties style:column-width="0.859in"/>
    </style:style>
    <style:style style:name="Table10.C" style:family="table-column">
      <style:table-column-properties style:column-width="0.8868in"/>
    </style:style>
    <style:style style:name="Table10.1" style:family="table-row">
      <style:table-row-properties style:min-row-height="0.275in" fo:keep-together="auto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3" style:family="table-row">
      <style:table-row-properties style:min-row-height="0.275in"/>
    </style:style>
    <style:style style:name="Table10.4" style:family="table-row">
      <style:table-row-properties style:min-row-height="0.275in"/>
    </style:style>
    <style:style style:name="Table9" style:family="table">
      <style:table-properties style:width="2.0604in" table:align="left" style:may-break-between-rows="true" table:border-model="collapsing"/>
    </style:style>
    <style:style style:name="Table9.A" style:family="table-column">
      <style:table-column-properties style:column-width="1.1806in"/>
    </style:style>
    <style:style style:name="Table9.B" style:family="table-column">
      <style:table-column-properties style:column-width="0.8799in"/>
    </style:style>
    <style:style style:name="Table9.1" style:family="table-row">
      <style:table-row-properties style:min-row-height="0.2903in" fo:keep-together="auto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style:min-row-height="0.2903in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.5924in" table:align="left" style:may-break-between-rows="true" table:border-model="collapsing"/>
    </style:style>
    <style:style style:name="Table7.A" style:family="table-column">
      <style:table-column-properties style:column-width="0.9049in"/>
    </style:style>
    <style:style style:name="Table7.B" style:family="table-column">
      <style:table-column-properties style:column-width="0.6875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 style:data-style-name="N130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 style:data-style-name="N13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2.3771in" table:align="left" style:may-break-between-rows="true" table:border-model="collapsing"/>
    </style:style>
    <style:style style:name="Table5.A" style:family="table-column">
      <style:table-column-properties style:column-width="0.9049in"/>
    </style:style>
    <style:style style:name="Table5.B" style:family="table-column">
      <style:table-column-properties style:column-width="0.7014in"/>
    </style:style>
    <style:style style:name="Table5.C" style:family="table-column">
      <style:table-column-properties style:column-width="0.7708in"/>
    </style:style>
    <style:style style:name="Table5.1" style:family="table-row">
      <style:table-row-properties style:min-row-height="0.275in"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2.6507in" table:align="left" style:may-break-between-rows="true" table:border-model="collapsing"/>
    </style:style>
    <style:style style:name="Table6.A" style:family="table-column">
      <style:table-column-properties style:column-width="0.9049in"/>
    </style:style>
    <style:style style:name="Table6.B" style:family="table-column">
      <style:table-column-properties style:column-width="0.859in"/>
    </style:style>
    <style:style style:name="Table6.C" style:family="table-column">
      <style:table-column-properties style:column-width="0.886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3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.0632in" table:align="left" style:may-break-between-rows="true" table:border-model="collapsing"/>
    </style:style>
    <style:style style:name="Table3.A" style:family="table-column">
      <style:table-column-properties style:column-width="1.1764in"/>
    </style:style>
    <style:style style:name="Table3.B" style:family="table-column">
      <style:table-column-properties style:column-width="0.8868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3.4375in" fo:margin-left="0.3542in" fo:break-before="page" table:align="left" style:may-break-between-rows="true" table:border-model="collapsing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4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129">
      <style:table-cell-properties fo:background-color="transparent" fo:padding="0in" fo:border="none" style:writing-mode="page">
        <style:background-image/>
      </style:table-cell-properties>
    </style:style>
    <style:style style:name="Table1.6" style:family="table-row">
      <style:table-row-properties style:min-row-height="0.0764in"/>
    </style:style>
    <style:style style:name="Table1.7" style:family="table-row">
      <style:table-row-properties style:min-row-height="0.0708in"/>
    </style:style>
    <style:style style:name="Table1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7" style:family="table-cell" style:data-style-name="N129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4.6632in" table:align="margins"/>
    </style:style>
    <style:style style:name="Table4.A" style:family="table-column">
      <style:table-column-properties style:column-width="0.3583in" style:rel-column-width="5037*"/>
    </style:style>
    <style:style style:name="Table4.C" style:family="table-column">
      <style:table-column-properties style:column-width="0.359in" style:rel-column-width="5047*"/>
    </style:style>
    <style:style style:name="Table4.M" style:family="table-column">
      <style:table-column-properties style:column-width="0.3597in" style:rel-column-width="505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M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M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s" fo:country="AR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2pt" fo:language="es" fo:country="AR" officeooo:rsid="001a0a55" officeooo:paragraph-rsid="001a0a55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fo:language="es" fo:country="AR" officeooo:rsid="001a0a55" officeooo:paragraph-rsid="001a0a55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0pt" fo:language="es" fo:country="AR" fo:font-weight="bold" officeooo:rsid="001a0a55" officeooo:paragraph-rsid="001a0a55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2pt" fo:language="es" fo:country="AR" fo:font-weight="bold" officeooo:rsid="001a0a55" officeooo:paragraph-rsid="001a0a55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6pt" fo:language="es" fo:country="AR" officeooo:rsid="001a0a55" officeooo:paragraph-rsid="001a0a55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fo:language="es" fo:country="AR" officeooo:rsid="001a0a55" officeooo:paragraph-rsid="001a0a55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0pt" fo:language="es" fo:country="AR" fo:font-weight="bold" officeooo:rsid="001cd2aa" officeooo:paragraph-rsid="001cd2aa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0pt" fo:language="es" fo:country="AR" officeooo:rsid="001cd2aa" officeooo:paragraph-rsid="001cd2aa" style:font-size-asian="17.5pt" style:font-size-complex="20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1b0551" officeooo:paragraph-rsid="001b0551" style:font-size-asian="14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0pt" fo:language="es" fo:country="AR" fo:font-weight="bold" officeooo:rsid="001cd2aa" officeooo:paragraph-rsid="001cd2aa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1b2767" officeooo:paragraph-rsid="001b2767" style:font-size-asian="14pt" style:font-size-complex="16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2d807c" officeooo:paragraph-rsid="00d6e585" style:font-size-asian="14pt" style:font-size-complex="16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2d807c" officeooo:paragraph-rsid="002d807c" style:font-size-asian="14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6pt" fo:language="es" fo:country="AR" fo:font-weight="bold" officeooo:rsid="001cd2aa" officeooo:paragraph-rsid="001cd2aa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s" fo:country="AR" officeooo:paragraph-rsid="001cd2aa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normal" officeooo:rsid="001d8ae5" officeooo:paragraph-rsid="001cd2aa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normal" officeooo:rsid="001d8ae5" officeooo:paragraph-rsid="001d8ae5" style:font-size-asian="14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00" loext:opacity="100%" style:font-name="Liberation Serif" fo:font-size="16pt" fo:language="es" fo:country="AR" fo:font-weight="normal" officeooo:paragraph-rsid="001d8ae5" fo:background-color="#ffffff" style:font-size-asian="16pt" style:font-size-complex="16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Liberation Serif" fo:font-size="16pt" fo:language="es" fo:country="AR" fo:font-weight="normal" officeooo:paragraph-rsid="001d8ae5"/>
    </style:style>
    <style:style style:name="P21" style:family="paragraph" style:parent-style-name="Standard" style:list-style-name="L1">
      <style:paragraph-properties fo:text-align="justify" style:justify-single-word="false"/>
      <style:text-properties fo:color="#000000" loext:opacity="100%" style:font-name="Liberation Serif" fo:font-size="16pt" fo:language="es" fo:country="AR" fo:font-weight="normal" officeooo:rsid="00d6e585" officeooo:paragraph-rsid="00d6e585" fo:background-color="#ffffff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Liberation Serif" fo:font-size="16pt" fo:language="es" fo:country="AR" fo:font-weight="normal" officeooo:paragraph-rsid="001d8ae5" fo:background-color="#ffffff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Liberation Serif" fo:font-size="16pt" fo:language="es" fo:country="AR" fo:font-weight="normal" officeooo:rsid="001f5477" officeooo:paragraph-rsid="001f5477" fo:background-color="#ffffff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normal" officeooo:rsid="001f5477" officeooo:paragraph-rsid="001f5477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22ff8b" officeooo:paragraph-rsid="0022ff8b" style:font-size-asian="14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20pt" fo:language="es" fo:country="AR" fo:font-weight="bold" officeooo:rsid="00254fb5" officeooo:paragraph-rsid="00254fb5" style:font-size-asian="17.5pt" style:font-weight-asian="bold" style:font-size-complex="2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4e95e6" officeooo:paragraph-rsid="004e95e6" style:font-size-asian="14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271981" officeooo:paragraph-rsid="00271981" style:font-size-asian="14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4fd73a" officeooo:paragraph-rsid="004fd73a" style:font-size-asian="14pt" style:font-size-complex="16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4e95e6" officeooo:paragraph-rsid="004fd73a" style:font-size-asian="14pt" style:font-size-complex="16pt"/>
    </style:style>
    <style:style style:name="P31" style:family="paragraph" style:parent-style-name="Standard">
      <style:paragraph-properties fo:text-align="justify" style:justify-single-word="false"/>
      <style:text-properties fo:language="es" fo:country="AR" officeooo:paragraph-rsid="0040f50f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32a1e7" officeooo:paragraph-rsid="0034cab4" style:font-size-asian="14pt" style:font-size-complex="16pt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officeooo:rsid="00983f50" officeooo:paragraph-rsid="00983f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officeooo:rsid="00ba3c0c" officeooo:paragraph-rsid="00ba3c0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officeooo:rsid="00c0f9bc" officeooo:paragraph-rsid="00c0f9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Frame_20_contents">
      <style:paragraph-properties fo:text-align="justify" style:justify-single-word="false"/>
      <style:text-properties fo:language="es" fo:country="AR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bold" officeooo:rsid="0034cab4" officeooo:paragraph-rsid="0034cab4" style:font-size-asian="14pt" style:font-weight-asian="bold" style:font-size-complex="16pt" style:font-weight-complex="bold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Liberation Serif" fo:font-size="16pt" fo:language="es" fo:country="AR" officeooo:rsid="0032a1e7" officeooo:paragraph-rsid="0034cab4" style:font-size-asian="14pt" style:font-size-complex="16pt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Liberation Serif" fo:font-size="16pt" fo:language="es" fo:country="AR" officeooo:rsid="0032a1e7" officeooo:paragraph-rsid="0032a1e7" style:font-size-asian="14pt" style:font-size-complex="16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32a1e7" officeooo:paragraph-rsid="0032a1e7" style:font-size-asian="14pt" style:font-size-complex="16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bold" officeooo:rsid="0034cab4" officeooo:paragraph-rsid="0032a1e7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6pt" fo:language="es" fo:country="AR" officeooo:rsid="0032a1e7" officeooo:paragraph-rsid="0032a1e7" style:font-size-asian="14pt" style:font-size-complex="16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3580d6" officeooo:paragraph-rsid="003580d6" style:font-size-asian="14pt" style:font-size-complex="16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normal" officeooo:rsid="003580d6" officeooo:paragraph-rsid="003580d6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332001" officeooo:paragraph-rsid="00332001" style:font-size-asian="14pt" style:font-size-complex="16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5847ea" officeooo:paragraph-rsid="005847ea" style:font-size-asian="14pt" style:font-size-complex="16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34cab4" officeooo:paragraph-rsid="0034cab4" style:font-size-asian="14pt" style:font-size-complex="16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4a66d6" officeooo:paragraph-rsid="004a66d6" style:font-size-asian="14pt" style:font-size-complex="16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5294d1" officeooo:paragraph-rsid="005294d1" style:font-size-asian="14pt" style:font-size-complex="16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55cf66" officeooo:paragraph-rsid="005294d1" style:font-size-asian="14pt" style:font-size-complex="16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5294d1" officeooo:paragraph-rsid="00571667" style:font-size-asian="14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language="es" fo:country="AR" fo:font-style="normal" fo:text-shadow="none" style:text-underline-style="none" fo:font-weight="normal" officeooo:rsid="005294d1" officeooo:paragraph-rsid="00571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language="es" fo:country="AR" fo:font-style="normal" fo:text-shadow="none" style:text-underline-style="none" fo:font-weight="normal" officeooo:rsid="00545206" officeooo:paragraph-rsid="005716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5294d1" officeooo:paragraph-rsid="005716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16pt" fo:language="es" fo:country="AR" officeooo:rsid="006248c3" officeooo:paragraph-rsid="006248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language="es" fo:country="AR" fo:font-style="normal" fo:text-shadow="none" style:text-underline-style="none" fo:font-weight="normal" officeooo:rsid="0070dd62" officeooo:paragraph-rsid="0070dd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language="es" fo:country="AR" fo:font-style="normal" fo:text-shadow="none" style:text-underline-style="none" fo:font-weight="normal" officeooo:rsid="0054fd18" officeooo:paragraph-rsid="005716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6pt" fo:language="es" fo:country="AR" officeooo:rsid="005294d1" officeooo:paragraph-rsid="005716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6pt" fo:language="es" fo:country="AR" officeooo:rsid="004adc30" officeooo:paragraph-rsid="005716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55cf66" officeooo:paragraph-rsid="00571667" style:font-size-asian="14pt" style:font-size-complex="16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55cf66" officeooo:paragraph-rsid="0055cf66" style:font-size-asian="14pt" style:font-size-complex="16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571667" officeooo:paragraph-rsid="00571667" style:font-size-asian="14pt" style:font-size-complex="16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normal" officeooo:rsid="00575809" officeooo:paragraph-rsid="00571667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6daa00" officeooo:paragraph-rsid="006daa00" style:font-size-asian="14pt" style:font-size-complex="16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normal" officeooo:rsid="006daa00" officeooo:paragraph-rsid="006daa00" style:font-size-asian="14pt" style:font-weight-asian="normal" style:font-size-complex="16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585d73" officeooo:paragraph-rsid="00585d73" style:font-size-asian="14pt" style:font-size-complex="16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4adc30" officeooo:paragraph-rsid="006693c0" style:font-size-asian="14pt" style:font-size-complex="16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64cf57" officeooo:paragraph-rsid="006693c0" style:font-size-asian="14pt" style:font-size-complex="16pt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6pt" fo:language="es" fo:country="AR" officeooo:rsid="00585d73" officeooo:paragraph-rsid="00585d73" style:font-size-asian="16pt" style:font-size-complex="16pt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6pt" fo:language="es" fo:country="AR" officeooo:rsid="006693c0" officeooo:paragraph-rsid="00585d73" style:font-size-asian="16pt" style:font-size-complex="16pt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language="es" fo:country="AR" fo:font-style="normal" fo:text-shadow="none" style:text-underline-style="none" fo:font-weight="normal" officeooo:rsid="005a02e4" officeooo:paragraph-rsid="005a02e4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6pt" fo:language="es" fo:country="AR" officeooo:rsid="0063ba1f" officeooo:paragraph-rsid="0063ba1f" style:font-size-asian="16pt" style:font-size-complex="16pt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6pt" fo:language="es" fo:country="AR" officeooo:rsid="00332001" officeooo:paragraph-rsid="005a02e4" style:font-size-asian="16pt" style:font-size-complex="16pt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6pt" fo:language="es" fo:country="AR" fo:font-weight="normal" officeooo:rsid="005b553e" officeooo:paragraph-rsid="00585d73" style:font-size-asian="14pt" style:font-weight-asian="normal" style:font-size-complex="16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language="es" fo:country="AR" officeooo:paragraph-rsid="005b553e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normal" officeooo:rsid="005b553e" officeooo:paragraph-rsid="005b553e" style:font-size-asian="14pt" style:font-weight-asian="normal" style:font-size-complex="16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Liberation Serif" fo:font-size="20pt" fo:language="es" fo:country="AR" fo:font-weight="bold" officeooo:rsid="005befef" officeooo:paragraph-rsid="005befef" style:font-size-asian="17.5pt" style:font-weight-asian="bold" style:font-size-complex="20pt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normal" officeooo:rsid="005befef" officeooo:paragraph-rsid="005befef" style:font-size-asian="14pt" style:font-weight-asian="normal" style:font-size-complex="16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normal" officeooo:rsid="00784233" officeooo:paragraph-rsid="00784233" style:font-size-asian="14pt" style:font-weight-asian="normal" style:font-size-complex="16pt" style:font-weight-complex="normal"/>
    </style:style>
    <style:style style:name="P81" style:family="paragraph" style:parent-style-name="Standard" style:list-style-name="L3">
      <style:paragraph-properties fo:text-align="justify" style:justify-single-word="false"/>
      <style:text-properties style:font-name="Liberation Serif" fo:font-size="16pt" fo:language="es" fo:country="AR" fo:font-weight="normal" officeooo:rsid="00784233" officeooo:paragraph-rsid="00784233" style:font-size-asian="14pt" style:font-weight-asian="normal" style:font-size-complex="16pt" style:font-weight-complex="normal"/>
    </style:style>
    <style:style style:name="P82" style:family="paragraph" style:parent-style-name="Standard" style:list-style-name="L3">
      <style:paragraph-properties fo:text-align="justify" style:justify-single-word="false"/>
      <style:text-properties style:font-name="Liberation Serif" fo:font-size="16pt" fo:language="es" fo:country="AR" fo:font-weight="normal" officeooo:rsid="008b41fc" officeooo:paragraph-rsid="008b41fc" style:font-size-asian="14pt" style:font-weight-asian="normal" style:font-size-complex="16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normal" officeooo:rsid="005dc3e2" officeooo:paragraph-rsid="005dc3e2" style:font-size-asian="14pt" style:font-weight-asian="normal" style:font-size-complex="16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6pt" fo:language="es" fo:country="AR" fo:font-weight="normal" officeooo:rsid="007c26d5" officeooo:paragraph-rsid="007c26d5" style:font-size-asian="14pt" style:font-weight-asian="normal" style:font-size-complex="16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Liberation Serif" fo:font-size="16pt" fo:language="es" fo:country="AR" officeooo:rsid="00332001" officeooo:paragraph-rsid="00332001" style:font-size-asian="14pt" style:font-size-complex="16pt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889b9b" officeooo:paragraph-rsid="00c280b7" style:font-size-asian="14pt" style:font-size-complex="16pt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8967cc" officeooo:paragraph-rsid="00c280b7" style:font-size-asian="14pt" style:font-size-complex="16pt"/>
    </style:style>
    <style:style style:name="P88" style:family="paragraph" style:parent-style-name="Standard">
      <style:paragraph-properties fo:text-align="justify" style:justify-single-word="false"/>
      <style:text-properties style:font-name="Liberation Serif" fo:font-size="16pt" fo:language="es" fo:country="AR" officeooo:rsid="008967cc" officeooo:paragraph-rsid="008967cc" style:font-size-asian="16pt" style:font-size-complex="16pt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language="es" fo:country="AR" fo:font-style="normal" fo:text-shadow="none" style:text-underline-style="none" fo:font-weight="normal" officeooo:rsid="008b41fc" officeooo:paragraph-rsid="009a6b1d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language="es" fo:country="AR" fo:font-style="normal" fo:text-shadow="none" style:text-underline-style="none" fo:font-weight="normal" officeooo:paragraph-rsid="009a6b1d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language="es" fo:country="AR" fo:font-style="normal" fo:text-shadow="none" style:text-underline-style="none" fo:font-weight="normal" officeooo:rsid="009a6b1d" officeooo:paragraph-rsid="009a6b1d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justify" style:justify-single-word="false"/>
      <style:text-properties fo:language="es" fo:country="AR" officeooo:paragraph-rsid="009a6b1d"/>
    </style:style>
    <style:style style:name="P93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9f7dc3" officeooo:paragraph-rsid="009f7dc3" style:font-size-asian="16pt" style:font-weight-asian="normal" style:font-size-complex="16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a04c1a" officeooo:paragraph-rsid="00a04c1a" style:font-size-asian="16pt" style:font-weight-asian="normal" style:font-size-complex="16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officeooo:rsid="00a0b600" officeooo:paragraph-rsid="00a0b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officeooo:rsid="008b41fc" officeooo:paragraph-rsid="009a6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center" style:justify-single-word="false"/>
      <style:text-properties fo:font-size="12pt" fo:language="es" fo:country="AR" fo:font-weight="normal" officeooo:rsid="00a04c1a" officeooo:paragraph-rsid="00a0b600" style:font-size-asian="12pt" style:font-weight-asian="normal" style:font-size-complex="12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officeooo:rsid="009a6b1d" officeooo:paragraph-rsid="009a6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a0b600" officeooo:paragraph-rsid="00a27272" style:font-size-asian="16pt" style:font-weight-asian="normal" style:font-size-complex="16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a1321a" officeooo:paragraph-rsid="00a1321a" style:font-size-asian="16pt" style:font-weight-asian="normal" style:font-size-complex="1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a1cd8b" officeooo:paragraph-rsid="00a1cd8b" style:font-size-asian="16pt" style:font-weight-asian="normal" style:font-size-complex="1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a3462d" officeooo:paragraph-rsid="00a1cd8b" style:font-size-asian="16pt" style:font-weight-asian="normal" style:font-size-complex="16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officeooo:rsid="00a3462d" officeooo:paragraph-rsid="00a346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center" style:justify-single-word="false"/>
      <style:text-properties fo:font-size="12pt" fo:language="es" fo:country="AR" fo:font-weight="normal" officeooo:rsid="00a3462d" officeooo:paragraph-rsid="00a3462d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a3462d" officeooo:paragraph-rsid="00a3462d" style:font-size-asian="16pt" style:font-weight-asian="normal" style:font-size-complex="16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a53ddf" officeooo:paragraph-rsid="00a53ddf" style:font-size-asian="16pt" style:font-weight-asian="normal" style:font-size-complex="16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add97a" officeooo:paragraph-rsid="00add97a" style:font-size-asian="16pt" style:font-weight-asian="normal" style:font-size-complex="16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a71954" officeooo:paragraph-rsid="00a71954" style:font-size-asian="16pt" style:font-weight-asian="normal" style:font-size-complex="16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a7b55b" officeooo:paragraph-rsid="00a7b55b" style:font-size-asian="16pt" style:font-weight-asian="normal" style:font-size-complex="16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officeooo:rsid="00a81501" officeooo:paragraph-rsid="00a81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officeooo:rsid="00a9a822" officeooo:paragraph-rsid="00a9a8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a81501" officeooo:paragraph-rsid="00add97a" style:font-size-asian="16pt" style:font-weight-asian="normal" style:font-size-complex="16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be99b8" officeooo:paragraph-rsid="00be99b8" style:font-size-asian="16pt" style:font-weight-asian="normal" style:font-size-complex="16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b08ee5" officeooo:paragraph-rsid="00b08ee5" style:font-size-asian="16pt" style:font-weight-asian="normal" style:font-size-complex="16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b08ee5" officeooo:paragraph-rsid="00bd7545" style:font-size-asian="16pt" style:font-weight-asian="normal" style:font-size-complex="16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b13b5b" officeooo:paragraph-rsid="00b13b5b" style:font-size-asian="16pt" style:font-weight-asian="normal" style:font-size-complex="16pt" style:font-weight-complex="normal"/>
    </style:style>
    <style:style style:name="P117" style:family="paragraph" style:parent-style-name="Standard">
      <style:paragraph-properties fo:text-align="center" style:justify-single-word="false"/>
      <style:text-properties fo:font-size="20pt" fo:language="es" fo:country="AR" fo:font-weight="bold" officeooo:rsid="00ca1232" officeooo:paragraph-rsid="00ca1232" style:font-size-asian="17.5pt" style:font-weight-asian="bold" style:font-size-complex="20pt" style:font-weight-complex="bold"/>
    </style:style>
    <style:style style:name="P118" style:family="paragraph" style:parent-style-name="Standard">
      <style:paragraph-properties fo:text-align="center" style:justify-single-word="false"/>
      <style:text-properties fo:font-size="16pt" fo:language="es" fo:country="AR" fo:font-weight="normal" officeooo:rsid="00ca302c" officeooo:paragraph-rsid="00ca1232" style:font-size-asian="16pt" style:font-weight-asian="normal" style:font-size-complex="16pt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da8577" officeooo:paragraph-rsid="00da8577" style:font-size-asian="16pt" style:font-weight-asian="normal" style:font-size-complex="16pt" style:font-weight-complex="normal" style:script-type="latin"/>
    </style:style>
    <style:style style:name="P120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de977a" officeooo:paragraph-rsid="00de977a" style:font-size-asian="16pt" style:font-weight-asian="normal" style:font-size-complex="16pt" style:font-weight-complex="normal" style:script-type="latin"/>
    </style:style>
    <style:style style:name="P121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ddbb2b" officeooo:paragraph-rsid="00ddbb2b" style:font-size-asian="16pt" style:font-weight-asian="normal" style:font-size-complex="16pt" style:font-weight-complex="normal" style:script-type="latin"/>
    </style:style>
    <style:style style:name="P122" style:family="paragraph" style:parent-style-name="Frame_20_contents">
      <style:paragraph-properties fo:text-align="justify" style:justify-single-word="false"/>
    </style:style>
    <style:style style:name="P123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df5036" officeooo:paragraph-rsid="00df5036" style:font-size-asian="16pt" style:font-weight-asian="normal" style:font-size-complex="16pt" style:font-weight-complex="normal" style:script-type="latin"/>
    </style:style>
    <style:style style:name="P124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dfde38" officeooo:paragraph-rsid="00dfde38" style:font-size-asian="16pt" style:font-weight-asian="normal" style:font-size-complex="16pt" style:font-weight-complex="normal" style:script-type="latin"/>
    </style:style>
    <style:style style:name="P125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e105a7" officeooo:paragraph-rsid="00e6b974" style:font-size-asian="16pt" style:font-weight-asian="normal" style:font-size-complex="16pt" style:font-weight-complex="normal" style:script-type="latin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normal" officeooo:rsid="00e105a7" officeooo:paragraph-rsid="00e105a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normal" officeooo:paragraph-rsid="00e105a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start" style:justify-single-word="false"/>
      <style:text-properties officeooo:paragraph-rsid="00e105a7"/>
    </style:style>
    <style:style style:name="P129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e3cb08" officeooo:paragraph-rsid="00e6b974" style:font-size-asian="16pt" style:font-weight-asian="normal" style:font-size-complex="16pt" style:font-weight-complex="normal" style:script-type="latin"/>
    </style:style>
    <style:style style:name="P130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e5a4c9" officeooo:paragraph-rsid="00e3cb08" style:font-size-asian="16pt" style:font-weight-asian="normal" style:font-size-complex="16pt" style:font-weight-complex="normal" style:script-type="latin"/>
    </style:style>
    <style:style style:name="P131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e6b974" officeooo:paragraph-rsid="00e6b974" style:font-size-asian="16pt" style:font-weight-asian="normal" style:font-size-complex="16pt" style:font-weight-complex="normal" style:script-type="latin"/>
    </style:style>
    <style:style style:name="P132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e884df" officeooo:paragraph-rsid="00e884df" style:font-size-asian="16pt" style:font-weight-asian="normal" style:font-size-complex="16pt" style:font-weight-complex="normal" style:script-type="latin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8e6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884df" officeooo:paragraph-rsid="00e8e6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text-align="justify" style:justify-single-word="false"/>
      <style:text-properties officeooo:paragraph-rsid="00e8e6a2"/>
    </style:style>
    <style:style style:name="P136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e8e6a2" officeooo:paragraph-rsid="00e8e6a2" style:font-size-asian="16pt" style:font-weight-asian="normal" style:font-size-complex="16pt" style:font-weight-complex="normal" style:script-type="latin"/>
    </style:style>
    <style:style style:name="P137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ea6dcd" officeooo:paragraph-rsid="00ea6dcd" style:font-size-asian="16pt" style:font-weight-asian="normal" style:font-size-complex="16pt" style:font-weight-complex="normal" style:script-type="latin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6dcd" officeooo:paragraph-rsid="00ea6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107aecf" officeooo:paragraph-rsid="0107aecf" style:font-size-asian="14pt" style:font-weight-asian="normal" style:font-size-complex="16pt" style:font-weight-complex="normal" style:script-type="latin"/>
    </style:style>
    <style:style style:name="P140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107d5d7" officeooo:paragraph-rsid="0107d5d7" style:font-size-asian="14pt" style:font-weight-asian="normal" style:font-size-complex="16pt" style:font-weight-complex="normal" style:script-type="latin"/>
    </style:style>
    <style:style style:name="P141" style:family="paragraph" style:parent-style-name="Frame_20_contents">
      <style:paragraph-properties fo:text-align="center" style:justify-single-word="false"/>
      <style:text-properties fo:font-size="16pt" fo:font-weight="bold" officeooo:rsid="01082bf2" officeooo:paragraph-rsid="01082bf2" style:font-size-asian="16pt" style:font-weight-asian="bold" style:font-size-complex="16pt" style:font-weight-complex="bold"/>
    </style:style>
    <style:style style:name="P142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1082bf2" officeooo:paragraph-rsid="01082bf2" style:font-size-asian="14pt" style:font-weight-asian="normal" style:font-size-complex="16pt" style:font-weight-complex="normal" style:script-type="latin"/>
    </style:style>
    <style:style style:name="P143" style:family="paragraph" style:parent-style-name="Standard">
      <style:paragraph-properties fo:text-align="center" style:justify-single-word="false"/>
      <style:text-properties fo:font-size="20pt" fo:language="es" fo:country="AR" fo:font-weight="bold" officeooo:rsid="00ec114e" officeooo:paragraph-rsid="00ec114e" style:font-size-asian="17.5pt" style:font-weight-asian="bold" style:font-size-complex="20pt" style:font-weight-complex="bold" style:script-type="latin"/>
    </style:style>
    <style:style style:name="P144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ec114e" officeooo:paragraph-rsid="00ec114e" style:font-size-asian="14pt" style:font-weight-asian="normal" style:font-size-complex="16pt" style:font-weight-complex="normal" style:script-type="latin"/>
    </style:style>
    <style:style style:name="P145" style:family="paragraph" style:parent-style-name="Standard">
      <style:paragraph-properties fo:text-align="justify" style:justify-single-word="false"/>
      <style:text-properties fo:font-size="16pt" fo:language="es" fo:country="AR" fo:font-weight="normal" officeooo:rsid="00edc56e" officeooo:paragraph-rsid="00edc56e" style:font-size-asian="14pt" style:font-weight-asian="normal" style:font-size-complex="16pt" style:font-weight-complex="normal" style:script-type="latin"/>
    </style:style>
    <style:style style:name="P146" style:family="paragraph" style:parent-style-name="Standard">
      <style:paragraph-properties fo:text-align="center" style:justify-single-word="false"/>
      <style:text-properties fo:font-size="20pt" fo:language="es" fo:country="AR" fo:font-weight="bold" officeooo:rsid="00eeffb7" officeooo:paragraph-rsid="00eeffb7" style:font-size-asian="20pt" style:font-weight-asian="bold" style:font-size-complex="20pt" style:font-weight-complex="bold" style:script-type="latin"/>
    </style:style>
    <style:style style:name="P147" style:family="paragraph" style:parent-style-name="Standard">
      <style:paragraph-properties fo:text-align="start" style:justify-single-word="false"/>
      <style:text-properties fo:font-size="14pt" fo:language="es" fo:country="AR" fo:font-weight="bold" officeooo:rsid="00eeffb7" officeooo:paragraph-rsid="00eeffb7" style:font-size-asian="14pt" style:font-weight-asian="bold" style:font-size-complex="14pt" style:font-weight-complex="bold" style:script-type="latin"/>
    </style:style>
    <style:style style:name="P148" style:family="paragraph" style:parent-style-name="Standard">
      <style:paragraph-properties fo:text-align="start" style:justify-single-word="false"/>
      <style:text-properties fo:font-size="14pt" fo:language="es" fo:country="AR" fo:font-weight="normal" officeooo:rsid="00f7a478" officeooo:paragraph-rsid="00f7a478" style:font-size-asian="14pt" style:font-weight-asian="normal" style:font-size-complex="14pt" style:font-weight-complex="normal" style:script-type="latin"/>
    </style:style>
    <style:style style:name="P149" style:family="paragraph" style:parent-style-name="Standard">
      <style:paragraph-properties fo:text-align="start" style:justify-single-word="false"/>
      <style:text-properties fo:font-size="14pt" fo:language="es" fo:country="AR" fo:font-weight="normal" officeooo:rsid="00f17982" officeooo:paragraph-rsid="00f17982" style:font-size-asian="14pt" style:font-weight-asian="normal" style:font-size-complex="14pt" style:font-weight-complex="normal" style:script-type="latin"/>
    </style:style>
    <style:style style:name="P150" style:family="paragraph" style:parent-style-name="Standard">
      <style:paragraph-properties fo:text-align="start" style:justify-single-word="false"/>
      <style:text-properties fo:font-size="14pt" fo:font-weight="normal" officeooo:rsid="00ef7d97" officeooo:paragraph-rsid="00f17982" style:font-size-asian="14pt" style:font-weight-asian="normal" style:font-size-complex="14pt" style:font-weight-complex="normal" style:script-type="latin"/>
    </style:style>
    <style:style style:name="P151" style:family="paragraph" style:parent-style-name="Standard">
      <style:paragraph-properties fo:text-align="start" style:justify-single-word="false"/>
      <style:text-properties fo:font-size="14pt" officeooo:rsid="00eeffb7" officeooo:paragraph-rsid="00f17982" style:font-size-asian="14pt" style:font-size-complex="14pt" style:script-type="latin"/>
    </style:style>
    <style:style style:name="P152" style:family="paragraph" style:parent-style-name="Standard">
      <style:paragraph-properties fo:text-align="start" style:justify-single-word="false"/>
      <style:text-properties fo:font-size="14pt" fo:language="es" fo:country="AR" fo:font-weight="bold" officeooo:rsid="00f17982" officeooo:paragraph-rsid="00f17982" style:font-size-asian="14pt" style:font-weight-asian="bold" style:font-size-complex="14pt" style:font-weight-complex="bold" style:script-type="latin"/>
    </style:style>
    <style:style style:name="P153" style:family="paragraph" style:parent-style-name="Standard">
      <style:paragraph-properties fo:text-align="start" style:justify-single-word="false"/>
      <style:text-properties fo:font-size="14pt" fo:language="es" fo:country="AR" fo:font-weight="normal" officeooo:rsid="00ef7d97" officeooo:paragraph-rsid="00ef7d97" style:font-size-asian="14pt" style:font-weight-asian="normal" style:font-size-complex="14pt" style:font-weight-complex="normal" style:script-type="latin"/>
    </style:style>
    <style:style style:name="P154" style:family="paragraph" style:parent-style-name="Standard">
      <style:paragraph-properties fo:text-align="start" style:justify-single-word="false"/>
      <style:text-properties fo:font-size="14pt" fo:language="es" fo:country="AR" fo:font-weight="normal" officeooo:rsid="00f38273" officeooo:paragraph-rsid="00f38273" style:font-size-asian="14pt" style:font-weight-asian="normal" style:font-size-complex="14pt" style:font-weight-complex="normal" style:script-type="latin"/>
    </style:style>
    <style:style style:name="P155" style:family="paragraph" style:parent-style-name="Standard" style:list-style-name="List_20_1">
      <style:paragraph-properties fo:text-align="start" style:justify-single-word="false"/>
      <style:text-properties fo:font-size="14pt" fo:language="es" fo:country="AR" fo:font-weight="normal" officeooo:rsid="00f38273" officeooo:paragraph-rsid="00f38273" style:font-size-asian="14pt" style:font-weight-asian="normal" style:font-size-complex="14pt" style:font-weight-complex="normal" style:script-type="latin"/>
    </style:style>
    <style:style style:name="P156" style:family="paragraph" style:parent-style-name="Standard" style:list-style-name="List_20_1">
      <style:paragraph-properties fo:text-align="start" style:justify-single-word="false"/>
      <style:text-properties fo:font-size="14pt" fo:language="es" fo:country="AR" fo:font-weight="normal" officeooo:rsid="00f7a478" officeooo:paragraph-rsid="00f7a478" style:font-size-asian="14pt" style:font-weight-asian="normal" style:font-size-complex="14pt" style:font-weight-complex="normal" style:script-type="latin"/>
    </style:style>
    <style:style style:name="P157" style:family="paragraph" style:parent-style-name="Standard" style:list-style-name="List_20_1">
      <style:paragraph-properties fo:text-align="start" style:justify-single-word="false"/>
      <style:text-properties fo:font-size="14pt" fo:language="es" fo:country="AR" fo:font-weight="normal" officeooo:rsid="00f41a6a" officeooo:paragraph-rsid="00f41a6a" style:font-size-asian="14pt" style:font-weight-asian="normal" style:font-size-complex="14pt" style:font-weight-complex="normal" style:script-type="latin"/>
    </style:style>
    <style:style style:name="P158" style:family="paragraph" style:parent-style-name="Standard">
      <style:paragraph-properties fo:text-align="start" style:justify-single-word="false"/>
      <style:text-properties fo:font-size="14pt" fo:language="es" fo:country="AR" fo:font-weight="normal" officeooo:rsid="00ef7d97" officeooo:paragraph-rsid="00f41a6a" style:font-size-asian="14pt" style:font-weight-asian="normal" style:font-size-complex="14pt" style:font-weight-complex="normal" style:script-type="lat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bad55"/>
    </style:style>
    <style:style style:name="T3" style:family="text">
      <style:text-properties fo:font-weight="normal" officeooo:rsid="00cc6713" style:font-weight-asian="normal" style:font-weight-complex="normal"/>
    </style:style>
    <style:style style:name="T4" style:family="text">
      <style:text-properties fo:font-weight="bold" officeooo:rsid="00cc6713" style:font-weight-asian="bold" style:font-weight-complex="bold"/>
    </style:style>
    <style:style style:name="T5" style:family="text">
      <style:text-properties officeooo:rsid="001b2767"/>
    </style:style>
    <style:style style:name="T6" style:family="text">
      <style:text-properties fo:font-weight="bold" officeooo:rsid="001b2767" style:font-weight-asian="bold" style:font-weight-complex="bold"/>
    </style:style>
    <style:style style:name="T7" style:family="text">
      <style:text-properties officeooo:rsid="00cbd744"/>
    </style:style>
    <style:style style:name="T8" style:family="text">
      <style:text-properties fo:font-weight="bold" officeooo:rsid="00cbd744" style:font-weight-asian="bold" style:font-weight-complex="bold"/>
    </style:style>
    <style:style style:name="T9" style:family="text">
      <style:text-properties officeooo:rsid="00246e50"/>
    </style:style>
    <style:style style:name="T10" style:family="text">
      <style:text-properties officeooo:rsid="00d6e585"/>
    </style:style>
    <style:style style:name="T11" style:family="text">
      <style:text-properties fo:font-weight="bold" officeooo:rsid="00d6e585" style:font-weight-asian="bold" style:font-weight-complex="bold"/>
    </style:style>
    <style:style style:name="T12" style:family="text">
      <style:text-properties officeooo:rsid="00a53b4d"/>
    </style:style>
    <style:style style:name="T13" style:family="text">
      <style:text-properties officeooo:rsid="00fe39e6"/>
    </style:style>
    <style:style style:name="T14" style:family="text">
      <style:text-properties officeooo:rsid="00cac426"/>
    </style:style>
    <style:style style:name="T15" style:family="text">
      <style:text-properties fo:font-weight="bold" officeooo:rsid="00cac426" style:font-weight-asian="bold" style:font-weight-complex="bold"/>
    </style:style>
    <style:style style:name="T16" style:family="text">
      <style:text-properties fo:font-weight="bold" officeooo:rsid="00a53b4d" style:font-weight-asian="bold" style:font-weight-complex="bold"/>
    </style:style>
    <style:style style:name="T17" style:family="text">
      <style:text-properties fo:font-weight="normal" officeooo:rsid="00fe39e6" style:font-weight-asian="normal" style:font-weight-complex="normal"/>
    </style:style>
    <style:style style:name="T18" style:family="text">
      <style:text-properties fo:font-weight="normal" officeooo:rsid="00a53b4d" style:font-weight-asian="normal" style:font-weight-complex="normal"/>
    </style:style>
    <style:style style:name="T19" style:family="text">
      <style:text-properties style:font-name="Liberation Serif" fo:font-size="16pt" fo:font-weight="normal" officeooo:rsid="001cd2aa" style:font-size-asian="14pt" style:font-weight-asian="normal" style:font-size-complex="16pt" style:font-weight-complex="normal"/>
    </style:style>
    <style:style style:name="T20" style:family="text">
      <style:text-properties style:font-name="Liberation Serif" fo:font-size="16pt" fo:font-weight="normal" officeooo:rsid="001d8ae5" style:font-size-asian="14pt" style:font-weight-asian="normal" style:font-size-complex="16pt" style:font-weight-complex="normal"/>
    </style:style>
    <style:style style:name="T21" style:family="text">
      <style:text-properties style:font-name="Liberation Serif" fo:font-size="16pt" fo:font-weight="bold" officeooo:rsid="001d8ae5" style:font-size-asian="14pt" style:font-weight-asian="bold" style:font-size-complex="16pt" style:font-weight-complex="bold"/>
    </style:style>
    <style:style style:name="T22" style:family="text">
      <style:text-properties style:font-name="Liberation Serif" fo:font-size="16pt" fo:font-weight="normal" officeooo:rsid="003cf644" style:font-size-asian="14pt" style:font-weight-asian="normal" style:font-size-complex="16pt" style:font-weight-complex="normal"/>
    </style:style>
    <style:style style:name="T23" style:family="text">
      <style:text-properties officeooo:rsid="00ff46e0"/>
    </style:style>
    <style:style style:name="T24" style:family="text">
      <style:text-properties fo:color="#000000" loext:opacity="100%" fo:background-color="#ffffff" loext:char-shading-value="0" style:font-size-asian="16pt" style:font-size-complex="16pt"/>
    </style:style>
    <style:style style:name="T25" style:family="text">
      <style:text-properties fo:color="#000000" loext:opacity="100%" officeooo:rsid="001d8ae5" fo:background-color="#ffffff" loext:char-shading-value="0" style:font-size-asian="16pt" style:font-size-complex="16pt"/>
    </style:style>
    <style:style style:name="T26" style:family="text">
      <style:text-properties fo:font-weight="bold" officeooo:rsid="002f9215" style:font-weight-asian="bold" style:font-weight-complex="bold"/>
    </style:style>
    <style:style style:name="T27" style:family="text">
      <style:text-properties fo:font-weight="bold" officeooo:rsid="004adc30" style:font-weight-asian="bold" style:font-weight-complex="bold"/>
    </style:style>
    <style:style style:name="T28" style:family="text">
      <style:text-properties officeooo:rsid="0021074f"/>
    </style:style>
    <style:style style:name="T29" style:family="text">
      <style:text-properties fo:font-weight="bold" officeooo:rsid="0021074f" style:font-weight-asian="bold" style:font-weight-complex="bold"/>
    </style:style>
    <style:style style:name="T30" style:family="text">
      <style:text-properties fo:color="#000000" loext:opacity="100%" fo:background-color="#ffffff" loext:char-shading-value="0"/>
    </style:style>
    <style:style style:name="T31" style:family="text">
      <style:text-properties fo:color="#000000" loext:opacity="100%" officeooo:rsid="00d6e585" fo:background-color="#ffffff" loext:char-shading-value="0"/>
    </style:style>
    <style:style style:name="T32" style:family="text">
      <style:text-properties fo:color="#000000" loext:opacity="100%" officeooo:rsid="002f9215" fo:background-color="#ffffff" loext:char-shading-value="0"/>
    </style:style>
    <style:style style:name="T33" style:family="text">
      <style:text-properties fo:color="#000000" loext:opacity="100%" officeooo:rsid="004adc30" fo:background-color="#ffffff" loext:char-shading-value="0"/>
    </style:style>
    <style:style style:name="T34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35" style:family="text">
      <style:text-properties fo:color="#000000" loext:opacity="100%" officeooo:rsid="00ff46e0" fo:background-color="#ffffff" loext:char-shading-value="0"/>
    </style:style>
    <style:style style:name="T36" style:family="text">
      <style:text-properties fo:color="#000000" loext:opacity="100%" officeooo:rsid="0022c74f" fo:background-color="#ffffff" loext:char-shading-value="0"/>
    </style:style>
    <style:style style:name="T37" style:family="text">
      <style:text-properties officeooo:rsid="007abdd2"/>
    </style:style>
    <style:style style:name="T38" style:family="text">
      <style:text-properties officeooo:rsid="004e95e6"/>
    </style:style>
    <style:style style:name="T39" style:family="text">
      <style:text-properties officeooo:rsid="00274bd0"/>
    </style:style>
    <style:style style:name="T40" style:family="text">
      <style:text-properties officeooo:rsid="005a4013"/>
    </style:style>
    <style:style style:name="T41" style:family="text">
      <style:text-properties fo:font-weight="bold" officeooo:rsid="005a02e4" style:font-weight-asian="bold" style:font-weight-complex="bold"/>
    </style:style>
    <style:style style:name="T42" style:family="text">
      <style:text-properties officeooo:rsid="00ddbb2b"/>
    </style:style>
    <style:style style:name="T43" style:family="text">
      <style:text-properties fo:font-weight="bold" officeooo:rsid="00ddbb2b" style:font-weight-asian="bold" style:font-weight-complex="bold"/>
    </style:style>
    <style:style style:name="T44" style:family="text">
      <style:text-properties officeooo:rsid="004eb6db"/>
    </style:style>
    <style:style style:name="T45" style:family="text">
      <style:text-properties fo:font-weight="bold" officeooo:rsid="004eb6db" style:font-weight-asian="bold" style:font-weight-complex="bold"/>
    </style:style>
    <style:style style:name="T46" style:family="text">
      <style:text-properties officeooo:rsid="0050daed"/>
    </style:style>
    <style:style style:name="T47" style:family="text">
      <style:text-properties style:font-name="Liberation Serif" fo:font-size="16pt" officeooo:rsid="0050daed" style:font-size-asian="14pt" style:font-size-complex="16pt"/>
    </style:style>
    <style:style style:name="T48" style:family="text">
      <style:text-properties style:font-name="Liberation Serif" fo:font-size="16pt" officeooo:rsid="00274bd0" style:font-size-asian="14pt" style:font-size-complex="16pt"/>
    </style:style>
    <style:style style:name="T49" style:family="text">
      <style:text-properties style:font-name="Liberation Serif" fo:font-size="16pt" fo:font-weight="bold" officeooo:rsid="00285308" style:font-size-asian="14pt" style:font-weight-asian="bold" style:font-size-complex="16pt" style:font-weight-complex="bold"/>
    </style:style>
    <style:style style:name="T50" style:family="text">
      <style:text-properties style:font-name="Liberation Serif" fo:font-size="16pt" officeooo:rsid="0032a1e7" style:font-size-asian="14pt" style:font-size-complex="16pt"/>
    </style:style>
    <style:style style:name="T51" style:family="text">
      <style:text-properties style:font-name="Liberation Serif" fo:font-size="16pt" fo:font-weight="normal" officeooo:rsid="00274bd0" style:font-size-asian="14pt" style:font-weight-asian="normal" style:font-size-complex="16pt" style:font-weight-complex="normal"/>
    </style:style>
    <style:style style:name="T52" style:family="text">
      <style:text-properties style:font-name="Liberation Serif" fo:font-size="16pt" officeooo:rsid="00285308" style:font-size-asian="14pt" style:font-size-complex="16pt"/>
    </style:style>
    <style:style style:name="T53" style:family="text">
      <style:text-properties style:font-name="Liberation Serif" fo:font-size="16pt" officeooo:rsid="003eaed3" style:font-size-asian="14pt" style:font-size-complex="16pt"/>
    </style:style>
    <style:style style:name="T54" style:family="text">
      <style:text-properties style:font-name="Liberation Serif" fo:font-size="16pt" officeooo:rsid="003fa448" style:font-size-asian="14pt" style:font-size-complex="16pt"/>
    </style:style>
    <style:style style:name="T55" style:family="text">
      <style:text-properties style:font-name="Liberation Serif" fo:font-size="16pt" officeooo:rsid="003eaed3" style:font-size-asian="16pt" style:font-size-complex="16pt"/>
    </style:style>
    <style:style style:name="T56" style:family="text">
      <style:text-properties style:font-name="Liberation Serif" fo:font-size="16pt" officeooo:rsid="003fa448" style:font-size-asian="16pt" style:font-size-complex="16pt"/>
    </style:style>
    <style:style style:name="T57" style:family="text">
      <style:text-properties fo:font-size="16pt" officeooo:rsid="003eaed3" style:font-size-asian="16pt" style:font-size-complex="16pt"/>
    </style:style>
    <style:style style:name="T58" style:family="text">
      <style:text-properties officeooo:rsid="00349b83"/>
    </style:style>
    <style:style style:name="T59" style:family="text">
      <style:text-properties fo:font-weight="bold" officeooo:rsid="0037d65a" style:font-weight-asian="bold" style:font-weight-complex="bold"/>
    </style:style>
    <style:style style:name="T60" style:family="text">
      <style:text-properties officeooo:rsid="005294d1"/>
    </style:style>
    <style:style style:name="T61" style:family="text">
      <style:text-properties officeooo:rsid="00332001"/>
    </style:style>
    <style:style style:name="T62" style:family="text">
      <style:text-properties fo:font-weight="bold" officeooo:rsid="006248c3" style:font-weight-asian="bold" style:font-weight-complex="bold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5847ea" style:font-weight-asian="normal" style:font-weight-complex="normal"/>
    </style:style>
    <style:style style:name="T65" style:family="text">
      <style:text-properties fo:font-weight="normal" officeooo:rsid="006248c3" style:font-weight-asian="normal" style:font-weight-complex="normal"/>
    </style:style>
    <style:style style:name="T66" style:family="text">
      <style:text-properties officeooo:rsid="0034cab4"/>
    </style:style>
    <style:style style:name="T67" style:family="text">
      <style:text-properties officeooo:rsid="0037d65a"/>
    </style:style>
    <style:style style:name="T68" style:family="text">
      <style:text-properties officeooo:rsid="0042dc68"/>
    </style:style>
    <style:style style:name="T69" style:family="text">
      <style:text-properties officeooo:rsid="003b0ce6"/>
    </style:style>
    <style:style style:name="T70" style:family="text">
      <style:text-properties officeooo:rsid="004ead25"/>
    </style:style>
    <style:style style:name="T71" style:family="text">
      <style:text-properties officeooo:rsid="01001004"/>
    </style:style>
    <style:style style:name="T72" style:family="text">
      <style:text-properties fo:font-weight="bold" officeooo:rsid="01001004" style:font-weight-asian="bold" style:font-weight-complex="bold"/>
    </style:style>
    <style:style style:name="T73" style:family="text">
      <style:text-properties fo:font-weight="bold" officeooo:rsid="004ead25" style:font-weight-asian="bold" style:font-weight-complex="bold"/>
    </style:style>
    <style:style style:name="T74" style:family="text">
      <style:text-properties officeooo:rsid="0055cf66"/>
    </style:style>
    <style:style style:name="T75" style:family="text">
      <style:text-properties officeooo:rsid="00545206"/>
    </style:style>
    <style:style style:name="T76" style:family="text">
      <style:text-properties fo:font-weight="bold" officeooo:rsid="00545206" style:font-weight-asian="bold" style:font-weight-complex="bold"/>
    </style:style>
    <style:style style:name="T77" style:family="text">
      <style:text-properties officeooo:rsid="006248c3"/>
    </style:style>
    <style:style style:name="T78" style:family="text">
      <style:text-properties officeooo:rsid="0054fd18"/>
    </style:style>
    <style:style style:name="T79" style:family="text">
      <style:text-properties fo:font-weight="normal" officeooo:rsid="00575809" style:font-weight-asian="normal" style:font-weight-complex="normal"/>
    </style:style>
    <style:style style:name="T80" style:family="text">
      <style:text-properties fo:font-weight="bold" officeooo:rsid="00575809" style:font-weight-asian="bold" style:font-weight-complex="bold"/>
    </style:style>
    <style:style style:name="T81" style:family="text">
      <style:text-properties fo:font-weight="bold" officeooo:rsid="00add97a" style:font-weight-asian="bold" style:font-weight-complex="bold"/>
    </style:style>
    <style:style style:name="T82" style:family="text">
      <style:text-properties officeooo:rsid="007d2f67"/>
    </style:style>
    <style:style style:name="T83" style:family="text">
      <style:text-properties officeooo:rsid="006daa00"/>
    </style:style>
    <style:style style:name="T84" style:family="text">
      <style:text-properties officeooo:rsid="006693c0"/>
    </style:style>
    <style:style style:name="T85" style:family="text">
      <style:text-properties officeooo:rsid="0074481f"/>
    </style:style>
    <style:style style:name="T86" style:family="text">
      <style:text-properties fo:font-weight="bold" officeooo:rsid="006693c0" style:font-weight-asian="bold" style:font-weight-complex="bold"/>
    </style:style>
    <style:style style:name="T87" style:family="text">
      <style:text-properties officeooo:rsid="006a4abc"/>
    </style:style>
    <style:style style:name="T88" style:family="text">
      <style:text-properties style:font-name="Liberation Serif" fo:font-size="16pt" fo:font-weight="normal" officeooo:rsid="005b553e" style:font-size-asian="14pt" style:font-weight-asian="normal" style:font-size-complex="16pt" style:font-weight-complex="normal"/>
    </style:style>
    <style:style style:name="T89" style:family="text">
      <style:text-properties style:font-name="Liberation Serif" fo:font-size="16pt" fo:font-weight="bold" officeooo:rsid="005b553e" style:font-size-asian="14pt" style:font-weight-asian="bold" style:font-size-complex="16pt" style:font-weight-complex="bold"/>
    </style:style>
    <style:style style:name="T90" style:family="text">
      <style:text-properties style:font-name="Liberation Serif" fo:font-size="16pt" fo:font-weight="normal" officeooo:rsid="0101fc53" style:font-size-asian="14pt" style:font-weight-asian="normal" style:font-size-complex="16pt" style:font-weight-complex="normal"/>
    </style:style>
    <style:style style:name="T91" style:family="text">
      <style:text-properties style:font-name="Liberation Serif" fo:font-size="16pt" fo:font-weight="normal" officeooo:rsid="0103f09e" style:font-size-asian="14pt" style:font-weight-asian="normal" style:font-size-complex="16pt" style:font-weight-complex="normal"/>
    </style:style>
    <style:style style:name="T92" style:family="text">
      <style:text-properties officeooo:rsid="00914634"/>
    </style:style>
    <style:style style:name="T93" style:family="text">
      <style:text-properties officeooo:rsid="00910bc2"/>
    </style:style>
    <style:style style:name="T94" style:family="text">
      <style:text-properties fo:font-weight="bold" officeooo:rsid="008cefa0" style:font-weight-asian="bold" style:font-weight-complex="bold"/>
    </style:style>
    <style:style style:name="T95" style:family="text">
      <style:text-properties officeooo:rsid="008cefa0"/>
    </style:style>
    <style:style style:name="T96" style:family="text">
      <style:text-properties officeooo:rsid="004adc30"/>
    </style:style>
    <style:style style:name="T97" style:family="text">
      <style:text-properties officeooo:rsid="008eb8c7"/>
    </style:style>
    <style:style style:name="T98" style:family="text">
      <style:text-properties officeooo:rsid="008f60ea"/>
    </style:style>
    <style:style style:name="T99" style:family="text">
      <style:text-properties fo:font-weight="bold" officeooo:rsid="008f60ea" style:font-weight-asian="bold" style:font-weight-complex="bold"/>
    </style:style>
    <style:style style:name="T100" style:family="text">
      <style:text-properties fo:font-weight="bold" officeooo:rsid="008533c0" style:font-weight-asian="bold" style:font-weight-complex="bold"/>
    </style:style>
    <style:style style:name="T101" style:family="text">
      <style:text-properties officeooo:rsid="008533c0"/>
    </style:style>
    <style:style style:name="T102" style:family="text">
      <style:text-properties officeooo:rsid="0083d7ba"/>
    </style:style>
    <style:style style:name="T103" style:family="text">
      <style:text-properties fo:font-weight="bold" officeooo:rsid="0085b5f6" style:font-weight-asian="bold" style:font-weight-complex="bold"/>
    </style:style>
    <style:style style:name="T104" style:family="text">
      <style:text-properties officeooo:rsid="00c280b7"/>
    </style:style>
    <style:style style:name="T105" style:family="text">
      <style:text-properties officeooo:rsid="008a091a"/>
    </style:style>
    <style:style style:name="T106" style:family="text">
      <style:text-properties fo:font-weight="bold" officeooo:rsid="00c280b7" style:font-weight-asian="bold" style:font-weight-complex="bold"/>
    </style:style>
    <style:style style:name="T107" style:family="text">
      <style:text-properties fo:font-weight="bold" officeooo:rsid="008a091a" style:font-weight-asian="bold" style:font-weight-complex="bold"/>
    </style:style>
    <style:style style:name="T108" style:family="text">
      <style:text-properties fo:font-weight="normal" officeooo:rsid="008a091a" style:font-weight-asian="normal" style:font-weight-complex="normal"/>
    </style:style>
    <style:style style:name="T109" style:family="text">
      <style:text-properties style:font-name="Liberation Serif" fo:font-size="16pt" officeooo:rsid="009a6b1d" style:font-size-asian="14pt" style:font-size-complex="16pt"/>
    </style:style>
    <style:style style:name="T110" style:family="text">
      <style:text-properties style:font-name="Liberation Serif" fo:font-size="16pt" officeooo:rsid="009c619a" style:font-size-asian="14pt" style:font-size-complex="16pt"/>
    </style:style>
    <style:style style:name="T111" style:family="text">
      <style:text-properties style:font-name="Liberation Serif" fo:font-size="16pt" officeooo:rsid="009d837c" style:font-size-asian="14pt" style:font-size-complex="16pt"/>
    </style:style>
    <style:style style:name="T112" style:family="text">
      <style:text-properties style:font-name="Liberation Serif" fo:font-size="16pt" fo:font-weight="bold" officeooo:rsid="009a6b1d" style:font-size-asian="16pt" style:font-weight-asian="bold" style:font-size-complex="16pt" style:font-weight-complex="bold"/>
    </style:style>
    <style:style style:name="T113" style:family="text">
      <style:text-properties fo:font-size="16pt" fo:font-weight="bold" style:font-size-asian="16pt" style:font-weight-asian="bold" style:font-size-complex="16pt" style:font-weight-complex="bold"/>
    </style:style>
    <style:style style:name="T114" style:family="text">
      <style:text-properties fo:font-size="16pt" fo:font-weight="bold" officeooo:rsid="009a6b1d" style:font-size-asian="16pt" style:font-weight-asian="bold" style:font-size-complex="16pt" style:font-weight-complex="bold"/>
    </style:style>
    <style:style style:name="T115" style:family="text">
      <style:text-properties fo:font-size="16pt" fo:font-weight="bold" officeooo:rsid="009d837c" style:font-size-asian="16pt" style:font-weight-asian="bold" style:font-size-complex="16pt" style:font-weight-complex="bold"/>
    </style:style>
    <style:style style:name="T116" style:family="text">
      <style:text-properties fo:font-size="16pt" fo:font-weight="normal" officeooo:rsid="009a6b1d" style:font-size-asian="16pt" style:font-weight-asian="normal" style:font-size-complex="16pt" style:font-weight-complex="normal"/>
    </style:style>
    <style:style style:name="T117" style:family="text">
      <style:text-properties fo:font-size="16pt" fo:font-weight="normal" officeooo:rsid="009c619a" style:font-size-asian="16pt" style:font-weight-asian="normal" style:font-size-complex="16pt" style:font-weight-complex="normal"/>
    </style:style>
    <style:style style:name="T118" style:family="text">
      <style:text-properties fo:font-size="16pt" fo:font-weight="bold" officeooo:rsid="009c619a" style:font-size-asian="16pt" style:font-weight-asian="bold" style:font-size-complex="16pt" style:font-weight-complex="bold"/>
    </style:style>
    <style:style style:name="T119" style:family="text">
      <style:text-properties officeooo:rsid="00a0b600"/>
    </style:style>
    <style:style style:name="T120" style:family="text">
      <style:text-properties officeooo:rsid="00a1321a"/>
    </style:style>
    <style:style style:name="T121" style:family="text">
      <style:text-properties officeooo:rsid="00a27272"/>
    </style:style>
    <style:style style:name="T122" style:family="text">
      <style:text-properties fo:font-weight="bold" officeooo:rsid="00a1321a" style:font-weight-asian="bold" style:font-weight-complex="bold"/>
    </style:style>
    <style:style style:name="T123" style:family="text">
      <style:text-properties officeooo:rsid="00a1cd8b"/>
    </style:style>
    <style:style style:name="T124" style:family="text">
      <style:text-properties fo:font-weight="bold" officeooo:rsid="00a1cd8b" style:font-weight-asian="bold" style:font-weight-complex="bold"/>
    </style:style>
    <style:style style:name="T125" style:family="text">
      <style:text-properties fo:font-weight="bold" officeooo:rsid="00a27272" style:font-weight-asian="bold" style:font-weight-complex="bold"/>
    </style:style>
    <style:style style:name="T126" style:family="text">
      <style:text-properties officeooo:rsid="00a3462d"/>
    </style:style>
    <style:style style:name="T127" style:family="text">
      <style:text-properties officeooo:rsid="00a4fa9e"/>
    </style:style>
    <style:style style:name="T128" style:family="text">
      <style:text-properties officeooo:rsid="00b13b5b"/>
    </style:style>
    <style:style style:name="T129" style:family="text">
      <style:text-properties officeooo:rsid="00be99b8"/>
    </style:style>
    <style:style style:name="T130" style:family="text">
      <style:text-properties officeooo:rsid="00bd7545"/>
    </style:style>
    <style:style style:name="T131" style:family="text">
      <style:text-properties fo:font-weight="bold" officeooo:rsid="00bd7545" style:font-weight-asian="bold" style:font-weight-complex="bold"/>
    </style:style>
    <style:style style:name="T132" style:family="text">
      <style:text-properties officeooo:rsid="00bd943d"/>
    </style:style>
    <style:style style:name="T133" style:family="text">
      <style:text-properties fo:font-weight="bold" officeooo:rsid="00bd943d" style:font-weight-asian="bold" style:font-weight-complex="bold"/>
    </style:style>
    <style:style style:name="T134" style:family="text">
      <style:text-properties officeooo:rsid="00beb854"/>
    </style:style>
    <style:style style:name="T135" style:family="text">
      <style:text-properties officeooo:rsid="00c8a8a5"/>
    </style:style>
    <style:style style:name="T136" style:family="text">
      <style:text-properties officeooo:rsid="00c7f224"/>
    </style:style>
    <style:style style:name="T137" style:family="text">
      <style:text-properties officeooo:rsid="00d82745"/>
    </style:style>
    <style:style style:name="T138" style:family="text">
      <style:text-properties officeooo:rsid="00dc6f5f"/>
    </style:style>
    <style:style style:name="T139" style:family="text">
      <style:text-properties fo:font-weight="bold" officeooo:rsid="00dc6f5f" style:font-weight-asian="bold" style:font-weight-complex="bold"/>
    </style:style>
    <style:style style:name="T140" style:family="text">
      <style:text-properties officeooo:rsid="00df5036"/>
    </style:style>
    <style:style style:name="T141" style:family="text">
      <style:text-properties officeooo:rsid="00dfde38"/>
    </style:style>
    <style:style style:name="T142" style:family="text">
      <style:text-properties officeooo:rsid="00e00328"/>
    </style:style>
    <style:style style:name="T143" style:family="text">
      <style:text-properties fo:font-weight="bold" officeooo:rsid="00e8e6a2" style:font-weight-asian="bold" style:font-weight-complex="bold"/>
    </style:style>
    <style:style style:name="T144" style:family="text">
      <style:text-properties officeooo:rsid="00e021ae"/>
    </style:style>
    <style:style style:name="T145" style:family="text">
      <style:text-properties officeooo:rsid="00eeffb7"/>
    </style:style>
    <style:style style:name="T146" style:family="text">
      <style:text-properties officeooo:rsid="00e16125"/>
    </style:style>
    <style:style style:name="T147" style:family="text">
      <style:text-properties officeooo:rsid="00e3cb08"/>
    </style:style>
    <style:style style:name="T148" style:family="text">
      <style:text-properties officeooo:rsid="00e333ea"/>
    </style:style>
    <style:style style:name="T149" style:family="text">
      <style:text-properties officeooo:rsid="00e6b974"/>
    </style:style>
    <style:style style:name="T150" style:family="text">
      <style:text-properties officeooo:rsid="00e8385d"/>
    </style:style>
    <style:style style:name="T151" style:family="text">
      <style:text-properties fo:font-weight="bold" officeooo:rsid="00e8385d" style:font-weight-asian="bold" style:font-weight-complex="bold"/>
    </style:style>
    <style:style style:name="T152" style:family="text">
      <style:text-properties officeooo:rsid="00ec114e"/>
    </style:style>
    <style:style style:name="T153" style:family="text">
      <style:text-properties officeooo:rsid="010a7d1f"/>
    </style:style>
    <style:style style:name="T154" style:family="text">
      <style:text-properties fo:font-weight="bold" officeooo:rsid="01081dae" style:font-weight-asian="bold" style:font-weight-complex="bold"/>
    </style:style>
    <style:style style:name="T155" style:family="text">
      <style:text-properties officeooo:rsid="01081dae"/>
    </style:style>
    <style:style style:name="T156" style:family="text">
      <style:text-properties officeooo:rsid="01085f62"/>
    </style:style>
    <style:style style:name="T157" style:family="text">
      <style:text-properties officeooo:rsid="00edc56e"/>
    </style:style>
    <style:style style:name="T158" style:family="text">
      <style:text-properties fo:font-weight="bold" officeooo:rsid="00edc56e" style:font-weight-asian="bold" style:font-weight-complex="bold"/>
    </style:style>
    <style:style style:name="T159" style:family="text">
      <style:text-properties officeooo:rsid="00f5b7e7"/>
    </style:style>
    <style:style style:name="T160" style:family="text">
      <style:text-properties fo:font-weight="bold" officeooo:rsid="00eeffb7" style:font-weight-asian="bold" style:font-weight-complex="bold"/>
    </style:style>
    <style:style style:name="T161" style:family="text">
      <style:text-properties officeooo:rsid="010952c5"/>
    </style:style>
    <style:style style:name="T162" style:family="text">
      <style:text-properties officeooo:rsid="00faef3c"/>
    </style:style>
    <style:style style:name="T163" style:family="text">
      <style:text-properties officeooo:rsid="00f7a478"/>
    </style:style>
    <style:style style:name="T164" style:family="text">
      <style:text-properties officeooo:rsid="00f17982"/>
    </style:style>
    <style:style style:name="T165" style:family="text">
      <style:text-properties officeooo:rsid="00f38273"/>
    </style:style>
    <style:style style:name="T166" style:family="text">
      <style:text-properties officeooo:rsid="00f41a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591in" fo:border="non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print-content="false" style:wrap="parallel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 loext:decorative="true">
        <style:columns fo:column-count="1" fo:column-gap="0in"/>
      </style:graphic-properties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UNIVERSIDAD NACIONAL DEL LITORAL </text:span>Facultad de Ingeniería y Ciencias Hídricas</text:p>
      <text:p text:style-name="P3"/>
      <text:p text:style-name="P3"/>
      <text:p text:style-name="P3"/>
      <text:p text:style-name="P3"/>
      <text:p text:style-name="P3"/>
      <text:p text:style-name="P4">Probabilidad y Estadística</text:p>
      <text:p text:style-name="P3">Ingeniería en Inteligencia Artificial</text:p>
      <text:p text:style-name="P3"/>
      <text:p text:style-name="P3"/>
      <text:p text:style-name="P3"/>
      <text:p text:style-name="P3"/>
      <text:p text:style-name="P5">La predictibilidad <text:span text:style-name="T2">y tendencias en</text:span> nuestras contraseñas</text:p>
      <text:p text:style-name="P3"/>
      <text:p text:style-name="P3"/>
      <text:p text:style-name="P6"/>
      <text:p text:style-name="P7">Gutiérrez, Lucas</text:p>
      <text:p text:style-name="P7"/>
      <text:p text:style-name="P7">Mayo de 2026</text:p>
      <text:p text:style-name="P8"><text:soft-page-break/>INTRODUCCIÓN</text:p>
      <text:p text:style-name="P9"/>
      <text:p text:style-name="P10">Las contraseñas que elegimos para resguardar nuestra intimidad en cada espacio digital pueden tener <text:span text:style-name="T1">patrones</text:span> o <text:span text:style-name="T1">elementos</text:span> que las hacen más predecibles al conocer otros factores externos a la misma, relacionados con nuestra <text:span text:style-name="T1">cognición </text:span><text:span text:style-name="T3">o con el </text:span><text:span text:style-name="T4">contexto</text:span>.</text:p>
      <text:p text:style-name="P10"/>
      <text:p text:style-name="P10">Lo que se nos hace más fácil de recordar suele tener <text:span text:style-name="T1">estructuras</text:span> y <text:span text:style-name="T1">relaciones subconscientes</text:span>. Cosas que a su vez pueden llegar a ser esperables <text:span text:style-name="T5">y por lo tanto </text:span><text:span text:style-name="T6">vulnerables</text:span><text:span text:style-name="T5"> a un análisis crítico.</text:span></text:p>
      <text:p text:style-name="P10"/>
      <text:p text:style-name="P10"/>
      <text:p text:style-name="P11">OBJETIVOS</text:p>
      <text:p text:style-name="P11"/>
      <text:p text:style-name="P12">En este trabajo no se pretende encontrar una métrica que sea eficaz a la hora de cuantificar qué tan vulnerable es una contraseña ante métodos de fuerza bruta. Si no mas bien a analizar <text:span text:style-name="T1">tendencias</text:span> <text:span text:style-name="T7">en </text:span><text:span text:style-name="T8">características</text:span><text:span text:style-name="T7"> </text:span>básicas relacionadas con el contenido propio de nuestras claves <text:span text:style-name="T9">privadas.</text:span></text:p>
      <text:p text:style-name="P10"/>
      <text:p text:style-name="P13"><text:span text:style-name="T10">Se va a u</text:span>tilizar <text:span text:style-name="T11">T</text:span><text:span text:style-name="T1">eoría de la </text:span><text:span text:style-name="T11">I</text:span><text:span text:style-name="T1">nformación</text:span> para medir la <text:span text:style-name="T12">impredictibilidad</text:span> de cada contraseña <text:span text:style-name="T13">del dataset </text:span>relacionando los <text:span text:style-name="T1">caracteres</text:span> que la conforman y analizando <text:span text:style-name="T1">frecuencias de aparición</text:span> para cada secuencia <text:span text:style-name="T13">de caracteres</text:span>.</text:p>
      <text:p text:style-name="P13"/>
      <text:p text:style-name="P12"><text:span text:style-name="T10">También se van a a</text:span>nalizar la<text:span text:style-name="T10">s </text:span><text:span text:style-name="T11">relaciones</text:span><text:span text:style-name="T10"> entre diferentes características y se les va a asignar un </text:span><text:span text:style-name="T11">modelo</text:span><text:span text:style-name="T10"> que se ajuste a la muestra.</text:span></text:p>
      <text:p text:style-name="P14"/>
      <text:p text:style-name="P12">El interés va mas por el lado de quizás descubrir <text:span text:style-name="T1">patrones subyacentes de la mente humana</text:span> a la hora de inventar un <text:span text:style-name="T1">secreto</text:span> que debemos recordar <text:span text:style-name="T14">y esperamos que sea </text:span><text:span text:style-name="T15">impredecible</text:span>. <text:span text:style-name="T12">O tal vez </text:span><text:span text:style-name="T14">llegar a observar</text:span><text:span text:style-name="T12"> influencias externas que nos </text:span><text:span text:style-name="T16">condicionan </text:span><text:span text:style-name="T17">en el acto</text:span><text:span text:style-name="T18">.</text:span></text:p>
      <text:p text:style-name="P8"><text:soft-page-break/>DATASET Y FILTRADO</text:p>
      <text:p text:style-name="P15"/>
      <text:p text:style-name="P16"><text:span text:style-name="T19">Para analizar </text:span><text:span text:style-name="T20">credenciales que contengan </text:span><text:span text:style-name="T21">usuario</text:span><text:span text:style-name="T20"> y </text:span><text:span text:style-name="T21">contraseña</text:span><text:span text:style-name="T20"> se recurrió a la filtración de datos conocida como </text:span><text:span text:style-name="T21">Collection #1</text:span><text:span text:style-name="T20">. La cual contiene </text:span><text:span text:style-name="T21">millones</text:span><text:span text:style-name="T20"> de credenciales publicadas en enero de </text:span><text:span text:style-name="T21">2019</text:span><text:span text:style-name="T20">, </text:span><text:span text:style-name="T22">robadas de diferentes páginas</text:span><text:span text:style-name="T20">.</text:span></text:p>
      <text:p text:style-name="P17"/>
      <text:p text:style-name="P18">Dado que la filtración original fue <text:span text:style-name="T1">eliminada</text:span>, se recurrió a <text:span text:style-name="T23">un enlace</text:span> <text:span text:style-name="T1">no oficial</text:span> de <text:span text:style-name="T23">una fuente desconocida </text:span>para descargarlo de forma descentralizada. Es por esto que la veracidad de los datos es <text:span text:style-name="T1">incomprobable</text:span>. Pero dada la naturaleza de las contraseñas, incluso siendo inventadas podrían servir para el análisis dado que fueron escritas por alguien.</text:p>
      <text:p text:style-name="P18"/>
      <text:p text:style-name="P18">Para el análisis se va a construir un dataset que contenga las <text:span text:style-name="T1">características de interés</text:span> correspondientes a <text:span text:style-name="T10">cada</text:span> contraseña. En este caso van a ser las siguientes:</text:p>
      <text:p text:style-name="P18"/>
      <text:list text:style-name="L1">
        <text:list-item>
          <text:p text:style-name="P19">Longitud</text:p>
        </text:list-item>
        <text:list-item>
          <text:p text:style-name="P20"><text:span text:style-name="T24">Cant</text:span><text:span text:style-name="T25">idad de letras</text:span><text:span text:style-name="T24"> minúsculas</text:span></text:p>
        </text:list-item>
        <text:list-item>
          <text:p text:style-name="P20"><text:span text:style-name="T24">Cant</text:span><text:span text:style-name="T25">idad de letras</text:span><text:span text:style-name="T24"> mayúsculas</text:span></text:p>
        </text:list-item>
        <text:list-item>
          <text:p text:style-name="P20"><text:span text:style-name="T24">Cant</text:span><text:span text:style-name="T25">idad de </text:span><text:span text:style-name="T24">números</text:span></text:p>
        </text:list-item>
        <text:list-item>
          <text:p text:style-name="P20"><text:span text:style-name="T24">Cant</text:span><text:span text:style-name="T25">idad de caracteres</text:span><text:span text:style-name="T24"> especiales</text:span></text:p>
        </text:list-item>
        <text:list-item>
          <text:p text:style-name="P21">Impredictibilidad Secuencial</text:p>
        </text:list-item>
      </text:list>
      <text:p text:style-name="P22"/>
      <text:p text:style-name="P23"><text:span text:style-name="T23">S</text:span>e programó un <text:span text:style-name="T1">script</text:span> que automatice <text:span text:style-name="T23">la extracción de estas características</text:span> para <text:span text:style-name="T26">230.0</text:span><text:span text:style-name="T27">00 </text:span>contraseña<text:span text:style-name="T10">s</text:span>. <text:span text:style-name="T28">(Ver sección </text:span><text:span text:style-name="T29">HERRAMIENTAS Y FUENTES</text:span><text:span text:style-name="T28">)</text:span></text:p>
      <text:p text:style-name="P23"/>
      <text:p text:style-name="P24"><text:span text:style-name="T30">L</text:span><text:span text:style-name="T31">a</text:span><text:span text:style-name="T30">s </text:span><text:span text:style-name="T32">23</text:span><text:span text:style-name="T33">0.0</text:span><text:span text:style-name="T32">00 </text:span><text:span text:style-name="T31">contraseñas</text:span><text:span text:style-name="T30"> fueron tomados </text:span><text:span text:style-name="T34">equidistantemente</text:span><text:span text:style-name="T30"> entre los </text:span><text:span text:style-name="T34">230</text:span><text:span text:style-name="T30"> archivos de texto plano (</text:span><text:span text:style-name="T32">10</text:span><text:span text:style-name="T33">00</text:span><text:span text:style-name="T30"> pares por archivo) para mitigar cualquier posible orden que estructure las </text:span><text:span text:style-name="T35">claves</text:span><text:span text:style-name="T30"> dentro d</text:span><text:span text:style-name="T36">e</text:span><text:span text:style-name="T30">l dataset original.</text:span></text:p>
      <text:p text:style-name="P25"><text:soft-page-break/>Dentro del dataset original hay contraseñas hasheadas, es decir, encriptadas con algoritmos <text:span text:style-name="T1">MD5</text:span>, <text:span text:style-name="T1">SHA1</text:span>, etc… Estos hashes se pueden identificar por su longitud y utilización de caracteres o números. Este tipo de contraseñas <text:span text:style-name="T1">no sirven </text:span>para el análisis ya que no representan lo que el usuario original decidió utilizar como clave. Es por eso que se decidió considerarlo <text:span text:style-name="T1">ruido</text:span> <text:span text:style-name="T37">e ignorarlo a la hora de recolectar las contraseñas desde el script.</text:span></text:p>
      <text:p text:style-name="P25"/>
      <text:p text:style-name="P26"><text:span text:style-name="T38">INFORMACIÓN PROPIA CONDICIONAL PROMEDIO</text:span><text:span text:style-name="T39"> </text:span>COMO MEDIDA DE <text:span text:style-name="T40">IM</text:span><text:span text:style-name="T38">PREDICTIBILIDAD</text:span></text:p>
      <text:p text:style-name="P25"/>
      <text:p text:style-name="P27">Junto con las demás métricas mencionadas, se va a calcular una métrica <text:span text:style-name="T10">a la cual se la va a llamar </text:span><text:span text:style-name="T41">im</text:span><text:span text:style-name="T1">predictibilidad secuencial</text:span>, <text:span text:style-name="T10">que realmente</text:span> va a ser la <text:span text:style-name="T1">información propia condicional promedio</text:span> <text:span text:style-name="T42">(o </text:span><text:span text:style-name="T43">IPCP</text:span><text:span text:style-name="T42">) </text:span>de la contraseña observada. En otras palabras, se promedia la información de las transiciones carácter a carácter de la propia contraseña <text:span text:style-name="T44">donde, por definición, la información va a ser mayor, a mayor </text:span><text:span text:style-name="T45">“sorpresa”</text:span><text:span text:style-name="T44"> haya en dichas transiciones.</text:span></text:p>
      <text:p text:style-name="P28"><draw:frame draw:style-name="fr1" draw:name="Image5" text:anchor-type="char" svg:x="4.1783in" svg:y="0.1571in" svg:width="2.2374in" svg:height="0.7201in" draw:z-index="65"><draw:image xlink:href="Pictures/1000000100000245000000BB9D82CB57.png" xlink:type="simple" xlink:show="embed" xlink:actuate="onLoad" draw:mime-type="image/png"/></draw:frame></text:p>
      <text:p text:style-name="P27"><draw:frame draw:style-name="fr1" draw:name="Image4" text:anchor-type="char" svg:x="0.0256in" svg:y="0.1028in" svg:width="3.5866in" svg:height="0.3472in" draw:z-index="64"><draw:image xlink:href="Pictures/100000010000037A0000005626C2C43A.png" xlink:type="simple" xlink:show="embed" xlink:actuate="onLoad" draw:mime-type="image/png"/></draw:frame></text:p>
      <text:p text:style-name="P29"/>
      <text:p text:style-name="P30"/>
      <text:p text:style-name="P29"><text:span text:style-name="T1">X</text:span> es la variable aleatoria que toma los valores correspondientes a cada carácter de la contraseña. P<draw:frame draw:style-name="fr2" draw:name="Image9" text:anchor-type="char" svg:x="2.5555in" svg:y="0.578in" svg:width="0.2374in" svg:height="0.2445in" draw:z-index="1"><draw:image xlink:href="Pictures/100000010000004100000043A1E86FA3.png" xlink:type="simple" xlink:show="embed" xlink:actuate="onLoad" draw:mime-type="image/png"/></draw:frame>or lo tanto <draw:frame draw:style-name="fr2" draw:name="Image8" text:anchor-type="char" svg:x="3.4772in" svg:y="0.2535in" svg:width="1.0118in" svg:height="0.2953in" draw:z-index="0"><draw:image xlink:href="Pictures/100000010000015B000000650177F792.png" xlink:type="simple" xlink:show="embed" xlink:actuate="onLoad" draw:mime-type="image/png"/></draw:frame><text:s text:c="19"/><text:span text:style-name="T46">representa la probabilidad estimada de que del carácter <text:s text:c="5"/>transicione al carácter</text:span><draw:frame draw:style-name="fr2" draw:name="Image10" text:anchor-type="char" svg:x="4.8744in" svg:y="0.5846in" svg:width="0.4256in" svg:height="0.2346in" draw:z-index="2"><draw:image xlink:href="Pictures/100000010000007600000041E3E249F0.png" xlink:type="simple" xlink:show="embed" xlink:actuate="onLoad" draw:mime-type="image/png"/></draw:frame><text:span text:style-name="T46"> <text:s text:c="8"/>.</text:span></text:p>
      <text:p text:style-name="P27"/>
      <text:p text:style-name="P31"><text:span text:style-name="T47">Ahora</text:span><text:span text:style-name="T48">, hay que obtener las probabilidades de que un carácter </text:span><text:span text:style-name="T49">A</text:span><text:span text:style-name="T48"> aparezca luego de </text:span><text:span text:style-name="T50">un</text:span><text:span text:style-name="T48"> carácter </text:span><text:span text:style-name="T49">B</text:span><text:span text:style-name="T51">.</text:span><text:span text:style-name="T48"> Esto se hace promediando </text:span><text:span text:style-name="T52">la frecuencia de aparición de cada par de caracteres contenidos en cada contraseña del dataset. </text:span><text:span text:style-name="T53">(</text:span><text:span text:style-name="T54">En este contexto: </text:span><text:span text:style-name="T55">Probabilidad estimada </text:span><text:span text:style-name="T56">≈ </text:span><text:span text:style-name="T53">Frecuenc</text:span><text:span text:style-name="T55">ia relativa empírica</text:span><text:span text:style-name="T57">)</text:span></text:p>
      <text:p text:style-name="P32"><text:soft-page-break/><text:span text:style-name="T58">Se construye una tabla de </text:span><text:span text:style-name="T59">frecuencias condicionales relativas</text:span><text:span text:style-name="T58"> donde cada fila representa el carácter actual y cada columna representa el siguiente carácter. </text:span><text:span text:style-name="T60">Veamos u</text:span>n ejemplo inventado para comprender esto:</text:p>
      <text:p text:style-name="P32"><draw:frame draw:style-name="fr3" draw:name="Frame3" text:anchor-type="paragraph" svg:x="2.0984in" svg:y="0.2398in" svg:width="4.7811in" draw:z-index="75"><draw:text-box fo:min-height="3.4661in"><table:table table:name="Table4" table:style-name="Table4" table:template-name="Default Style"><table:table-column table:style-name="Table4.A" table:number-columns-repeated="2"/><table:table-column table:style-name="Table4.C"/><table:table-column table:style-name="Table4.A" table:number-columns-repeated="2"/><table:table-column table:style-name="Table4.C"/><table:table-column table:style-name="Table4.A"/><table:table-column table:style-name="Table4.C"/><table:table-column table:style-name="Table4.A" table:number-columns-repeated="2"/><table:table-column table:style-name="Table4.C"/><table:table-column table:style-name="Table4.A"/><table:table-column table:style-name="Table4.M"/><table:table-row><table:table-cell table:style-name="Table4.A1" office:value-type="string"><text:p text:style-name="P33"/></table:table-cell><table:table-cell table:style-name="Table4.A1" office:value-type="string"><text:p text:style-name="P34">|</text:p></table:table-cell><table:table-cell table:style-name="Table4.A1" office:value-type="string"><text:p text:style-name="P35">b</text:p></table:table-cell><table:table-cell table:style-name="Table4.A1" office:value-type="string"><text:p text:style-name="P34">e</text:p></table:table-cell><table:table-cell table:style-name="Table4.A1" office:value-type="string"><text:p text:style-name="P35">h</text:p></table:table-cell><table:table-cell table:style-name="Table4.A1" office:value-type="string"><text:p text:style-name="P36">l</text:p></table:table-cell><table:table-cell table:style-name="Table4.A1" office:value-type="string"><text:p text:style-name="P34">o</text:p></table:table-cell><table:table-cell table:style-name="Table4.A1" office:value-type="string"><text:p text:style-name="P34">r</text:p></table:table-cell><table:table-cell table:style-name="Table4.A1" office:value-type="string"><text:p text:style-name="P34">t</text:p></table:table-cell><table:table-cell table:style-name="Table4.A1" office:value-type="string"><text:p text:style-name="P34">y</text:p></table:table-cell><table:table-cell table:style-name="Table4.A1" office:value-type="string"><text:p text:style-name="P34">1</text:p></table:table-cell><table:table-cell table:style-name="Table4.A1" office:value-type="string"><text:p text:style-name="P34">2</text:p></table:table-cell><table:table-cell table:style-name="Table4.M1" office:value-type="string"><text:p text:style-name="P34">3</text:p></table:table-cell></table:table-row><table:table-row><table:table-cell table:style-name="Table4.A2" office:value-type="string"><text:p text:style-name="P34">|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.75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.25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M2" office:value-type="string"><text:p text:style-name="P34">0</text:p></table:table-cell></table:table-row><table:table-row><table:table-cell table:style-name="Table4.A2" office:value-type="string"><text:p text:style-name="P34">b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1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M2" office:value-type="string"><text:p text:style-name="P34">0</text:p></table:table-cell></table:table-row><table:table-row><table:table-cell table:style-name="Table4.A2" office:value-type="string"><text:p text:style-name="P34">e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.66</text:p></table:table-cell><table:table-cell table:style-name="Table4.A2" office:value-type="string"><text:p text:style-name="P34">0</text:p></table:table-cell><table:table-cell table:style-name="Table4.A2" office:value-type="string"><text:p text:style-name="P34">0.33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M2" office:value-type="string"><text:p text:style-name="P34">0</text:p></table:table-cell></table:table-row><table:table-row><table:table-cell table:style-name="Table4.A2" office:value-type="string"><text:p text:style-name="P34">h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1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M2" office:value-type="string"><text:p text:style-name="P34">0</text:p></table:table-cell></table:table-row><table:table-row><table:table-cell table:style-name="Table4.A2" office:value-type="string"><text:p text:style-name="P34">l</text:p></table:table-cell><table:table-cell table:style-name="Table4.A2" office:value-type="string"><text:p text:style-name="P34">0</text:p></table:table-cell><table:table-cell table:style-name="Table4.A2" office:value-type="string"><text:p text:style-name="P34">0.25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.5</text:p></table:table-cell><table:table-cell table:style-name="Table4.A2" office:value-type="string"><text:p text:style-name="P34">0.25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M2" office:value-type="string"><text:p text:style-name="P34">0</text:p></table:table-cell></table:table-row><table:table-row><table:table-cell table:style-name="Table4.A2" office:value-type="string"><text:p text:style-name="P34">o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.5</text:p></table:table-cell><table:table-cell table:style-name="Table4.A2" office:value-type="string"><text:p text:style-name="P34">0.5</text:p></table:table-cell><table:table-cell table:style-name="Table4.A2" office:value-type="string"><text:p text:style-name="P34">0</text:p></table:table-cell><table:table-cell table:style-name="Table4.M2" office:value-type="string"><text:p text:style-name="P34">0</text:p></table:table-cell></table:table-row><table:table-row><table:table-cell table:style-name="Table4.A2" office:value-type="string"><text:p text:style-name="P34">r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1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M2" office:value-type="string"><text:p text:style-name="P34">0</text:p></table:table-cell></table:table-row><table:table-row><table:table-cell table:style-name="Table4.A2" office:value-type="string"><text:p text:style-name="P34">t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1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M2" office:value-type="string"><text:p text:style-name="P34">0</text:p></table:table-cell></table:table-row><table:table-row><table:table-cell table:style-name="Table4.A2" office:value-type="string"><text:p text:style-name="P34">y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M2" office:value-type="string"><text:p text:style-name="P34">1</text:p></table:table-cell></table:table-row><table:table-row><table:table-cell table:style-name="Table4.A2" office:value-type="string"><text:p text:style-name="P34">1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1</text:p></table:table-cell><table:table-cell table:style-name="Table4.M2" office:value-type="string"><text:p text:style-name="P34">0</text:p></table:table-cell></table:table-row><table:table-row><table:table-cell table:style-name="Table4.A2" office:value-type="string"><text:p text:style-name="P34">2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M2" office:value-type="string"><text:p text:style-name="P34">1</text:p></table:table-cell></table:table-row><table:table-row><table:table-cell table:style-name="Table4.A2" office:value-type="string"><text:p text:style-name="P34">3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A2" office:value-type="string"><text:p text:style-name="P34">0</text:p></table:table-cell><table:table-cell table:style-name="Table4.M2" office:value-type="string"><text:p text:style-name="P34">1</text:p></table:table-cell></table:table-row></table:table><text:p text:style-name="P37"/></draw:text-box></draw:frame></text:p>
      <text:p text:style-name="P38">CONTRASEÑAS</text:p>
      <text:p text:style-name="P32"/>
      <text:list text:style-name="L2">
        <text:list-item>
          <text:p text:style-name="P39">hello123</text:p>
        </text:list-item>
        <text:list-item>
          <text:p text:style-name="P40">hero1</text:p>
        </text:list-item>
        <text:list-item>
          <text:p text:style-name="P40">hellboy</text:p>
        </text:list-item>
        <text:list-item>
          <text:p text:style-name="P40"><text:span text:style-name="T61">t</text:span>roy33</text:p>
        </text:list-item>
      </text:list>
      <text:p text:style-name="P41"/>
      <text:p text:style-name="P42">SECUENCIAS</text:p>
      <text:p text:style-name="P41"/>
      <text:p text:style-name="P43">he el ll lo o1 12 23</text:p>
      <text:p text:style-name="P43">he er ro o1</text:p>
      <text:p text:style-name="P43">he el ll lb bo oy</text:p>
      <text:p text:style-name="P43">tr ro oy y3 33</text:p>
      <text:p text:style-name="P44"/>
      <text:p text:style-name="P44">Se utiliza un carácter especial<text:span text:style-name="T1"> </text:span><text:span text:style-name="T62">|</text:span><text:span text:style-name="T1"> </text:span><text:span text:style-name="T63">para indicar el comienzo de una clave. Esto permite calcular la </text:span><text:span text:style-name="T64">probabilidad de transición </text:span><text:span text:style-name="T63">incluso para el primer carácter real de la contraseña. De este modo, se agregan las secuencias al ejemplo: </text:span><text:span text:style-name="T65">|</text:span><text:span text:style-name="T63">h, </text:span><text:span text:style-name="T65">|</text:span><text:span text:style-name="T63">h, </text:span><text:span text:style-name="T65">|</text:span><text:span text:style-name="T63">h, </text:span><text:span text:style-name="T65">|</text:span><text:span text:style-name="T63">t.</text:span></text:p>
      <text:p text:style-name="P45"/>
      <text:p text:style-name="P46">La normalización de se h<text:span text:style-name="T66">izo</text:span> dividiendo cada frecuencia por la suma de las frecuencias de cada fila. <text:span text:style-name="T67">Representando que si o si va a haber un carácter consecutivo al actual. </text:span><text:span text:style-name="T68">De modo que se cumpla:</text:span></text:p>
      <text:p text:style-name="P46"><draw:frame draw:style-name="fr1" draw:name="Image11" text:anchor-type="char" svg:x="0.8764in" svg:y="0.1311in" svg:width="1.9417in" svg:height="0.5457in" draw:z-index="67"><draw:image xlink:href="Pictures/10000001000002A5000000BECCBC9E44.png" xlink:type="simple" xlink:show="embed" xlink:actuate="onLoad" draw:mime-type="image/png"/></draw:frame><draw:frame draw:style-name="fr1" draw:name="Image7" text:anchor-type="char" svg:x="3.3071in" svg:y="0.1929in" svg:width="2.9071in" svg:height="0.5047in" draw:z-index="63"><draw:image xlink:href="Pictures/100000010000033D00000090646342AE.png" xlink:type="simple" xlink:show="embed" xlink:actuate="onLoad" draw:mime-type="image/png"/></draw:frame></text:p>
      <text:p text:style-name="P46"/>
      <text:p text:style-name="P46"/>
      <text:p text:style-name="P47"><text:span text:style-name="T1">count(BA)</text:span> representa la cantidad de veces que ocurrió la transición B→A, mientras que <text:span text:style-name="T1">count(B) </text:span>representa el total de transiciones partiendo desde B.</text:p>
      <text:p text:style-name="P48"><text:soft-page-break/>Dado que ya se tiene la <text:span text:style-name="T69">frecuencia condicional relativa </text:span>de cada carácter dado el anterior. Se puede calcular la “<text:span text:style-name="T38">sorpresa</text:span>” <text:span text:style-name="T38">de cada transición de caracteres dentro de una contraseña seleccionada. </text:span><text:span text:style-name="T70">Donde transiciones poco comunes van a representar </text:span><text:span text:style-name="T71">mayor</text:span><text:span text:style-name="T70"> </text:span><text:span text:style-name="T72">im</text:span><text:span text:style-name="T73">predictibilidad secuencial</text:span><text:span text:style-name="T70">.</text:span></text:p>
      <text:p text:style-name="P48"/>
      <text:p text:style-name="P49">Las frecuencias condicionales relativas se calcularon para <text:span text:style-name="T37">las 230.000</text:span> contraseñas diferentes <text:span text:style-name="T60">y </text:span>para todos los caracteres posibles dentro de los límites de lo que las <text:span text:style-name="T70">propias </text:span>páginas web permiten utilizar. Mientras más cantidad de contraseñas se analicen, mejor va a ser la estimación.</text:p>
      <text:p text:style-name="P49"/>
      <text:p text:style-name="P50">Veamos dos <text:span text:style-name="T74">muestras de la frecuencia condicional relativa de cada secuencia para 2 contraseñas diferentes</text:span>, <text:span text:style-name="T75">esta vez con las probabilidades </text:span><text:span text:style-name="T76">reales</text:span><text:span text:style-name="T75"> obtenidas a partir del dataset.</text:span></text:p>
      <text:p text:style-name="P51"><draw:frame draw:style-name="fr3" draw:name="Frame1" text:anchor-type="paragraph" svg:x="-0.5134in" svg:y="0.148in" svg:width="3.9457in" svg:height="2.1075in" draw:z-index="66"><draw:text-box><text:p text:style-name="P52"/><table:table table:name="Table1" table:style-name="Table1" table:template-name="Academic"><table:table-column table:style-name="Table1.A"/><table:table-column table:style-name="Table1.B"/><table:table-column table:style-name="Table1.C"/><table:table-column table:style-name="Table1.B"/><table:table-row table:style-name="Table1.1"><table:table-cell table:style-name="Table1.A1" table:number-columns-spanned="2" office:value-type="string"><text:p text:style-name="P53">steran</text:p></table:table-cell><table:covered-table-cell/><table:table-cell table:style-name="Table1.A1" table:number-columns-spanned="2" office:value-type="string"><text:p text:style-name="P53">[7%?G.</text:p></table:table-cell><table:covered-table-cell/></table:table-row><table:table-row><table:table-cell table:style-name="Table1.A2" office:value-type="string"><text:p text:style-name="P54"><text:span text:style-name="T77">|</text:span>s</text:p></table:table-cell><table:table-cell table:style-name="Table1.A2" office:value-type="string"><text:p text:style-name="P55">0.067273</text:p></table:table-cell><table:table-cell table:style-name="Table1.A2" office:value-type="string"><text:p text:style-name="P54"><text:span text:style-name="T77">|</text:span><text:span text:style-name="T78">[</text:span></text:p></table:table-cell><table:table-cell table:style-name="Table1.A2" office:value-type="string"><text:p text:style-name="P56">0.000000</text:p></table:table-cell></table:table-row><table:table-row><table:table-cell table:style-name="Table1.A2" office:value-type="string"><text:p text:style-name="P57">st</text:p></table:table-cell><table:table-cell table:style-name="Table1.B3" office:value-type="float" office:value="0.120561"><text:p text:style-name="P55">0.120561</text:p></table:table-cell><table:table-cell table:style-name="Table1.A2" office:value-type="string"><text:p text:style-name="P58">[7</text:p></table:table-cell><table:table-cell table:style-name="Table1.B3" office:value-type="float" office:value="0.2"><text:p text:style-name="P54">0.<text:span text:style-name="T78">2</text:span>00000</text:p></table:table-cell></table:table-row><table:table-row><table:table-cell table:style-name="Table1.A2" office:value-type="string"><text:p text:style-name="P57">te</text:p></table:table-cell><table:table-cell table:style-name="Table1.B3" office:value-type="float" office:value="0.148243"><text:p text:style-name="P55">0.148243</text:p></table:table-cell><table:table-cell table:style-name="Table1.A2" office:value-type="string"><text:p text:style-name="P58">7%</text:p></table:table-cell><table:table-cell table:style-name="Table1.B3" office:value-type="float" office:value="0"><text:p text:style-name="P59">0.00<text:span text:style-name="T74">0000</text:span></text:p></table:table-cell></table:table-row><table:table-row><table:table-cell table:style-name="Table1.A2" office:value-type="string"><text:p text:style-name="P57">er</text:p></table:table-cell><table:table-cell table:style-name="Table1.B3" office:value-type="float" office:value="0.171525"><text:p text:style-name="P55">0.171525</text:p></table:table-cell><table:table-cell table:style-name="Table1.A2" office:value-type="string"><text:p text:style-name="P54">%?</text:p></table:table-cell><table:table-cell table:style-name="Table1.B3" office:value-type="float" office:value="0.047619"><text:p text:style-name="P60">0.047619</text:p></table:table-cell></table:table-row><table:table-row table:style-name="Table1.6"><table:table-cell table:style-name="Table1.A2" office:value-type="string"><text:p text:style-name="P57">ra</text:p></table:table-cell><table:table-cell table:style-name="Table1.B3" office:value-type="float" office:value="0.125157"><text:p text:style-name="P55">0.125157</text:p></table:table-cell><table:table-cell table:style-name="Table1.A2" office:value-type="string"><text:p text:style-name="P54">?<text:span text:style-name="T78">G</text:span></text:p></table:table-cell><table:table-cell table:style-name="Table1.B3" office:value-type="float" office:value="0.047619"><text:p text:style-name="P60">0.047619</text:p></table:table-cell></table:table-row><table:table-row table:style-name="Table1.7"><table:table-cell table:style-name="Table1.A7" office:value-type="string"><text:p text:style-name="P57">an</text:p></table:table-cell><table:table-cell table:style-name="Table1.B7" office:value-type="float" office:value="0.143363"><text:p text:style-name="P55">0.143363</text:p></table:table-cell><table:table-cell table:style-name="Table1.C7" office:value-type="string"><text:p text:style-name="P58">G.</text:p></table:table-cell><table:table-cell table:style-name="Table1.B7" office:value-type="float" office:value="0.00211416"><text:p text:style-name="P60">0.002114</text:p></table:table-cell></table:table-row></table:table><text:p text:style-name="P61"/></draw:text-box></draw:frame></text:p>
      <text:p text:style-name="P62">Podemos observar que existen secuencias de 2 caracteres que como nunca aparecieron en el dataset, tienen frecuencia igual a <text:span text:style-name="T1">cero</text:span>. Esto va a ser un problema porque para calcular la información propia condicional promedio necesitamos aplicarles el <text:span text:style-name="T1">logaritmo base 2</text:span>.</text:p>
      <text:p text:style-name="P62"/>
      <text:p text:style-name="P63">La solución a esto es algo llamado <text:span text:style-name="T1">Suavizado de Laplace</text:span><text:span text:style-name="T63">. </text:span><text:span text:style-name="T79">Es una forma alternativa de normalizar nuestras frecuencias de modo que se le asigne como mínimo </text:span><text:span text:style-name="T80">una</text:span><text:span text:style-name="T79"> aparición a cada secuencia posible.</text:span></text:p>
      <text:p text:style-name="P64"/>
      <text:p text:style-name="P65"><draw:frame draw:style-name="fr3" draw:name="Frame2" text:anchor-type="paragraph" svg:x="-0.1256in" svg:y="0.0346in" svg:width="2.7217in" draw:z-index="69"><draw:text-box fo:min-height="1.0311in"><text:p text:style-name="P37"><draw:frame draw:style-name="fr1" draw:name="Image12 Copy 1" text:anchor-type="char" svg:x="0.0134in" svg:y="0.1307in" svg:width="2.3827in" svg:height="0.5898in" draw:z-index="70"><draw:image xlink:href="Pictures/1000000100000300000000BEE40FB752.png" xlink:type="simple" xlink:show="embed" xlink:actuate="onLoad" draw:mime-type="image/png"/></draw:frame></text:p></draw:text-box></draw:frame><text:span text:style-name="T63">A el valor de </text:span><text:span text:style-name="T1">count(BA)</text:span><text:span text:style-name="T63"> anterior, se le suma 1. Y al </text:span><text:span text:style-name="T1">count(B)</text:span><text:span text:style-name="T63"> se le va a sumar 1 por cada posible carácter. El parámetro </text:span><text:span text:style-name="T1">V</text:span><text:span text:style-name="T63"> representa la cantidad de caracteres posibles.</text:span></text:p>
      <text:p text:style-name="P66"><draw:frame draw:style-name="fr1" draw:name="Image13" text:anchor-type="char" svg:x="-0.5654in" svg:y="0.3264in" svg:width="4.5in" svg:height="3.7591in" draw:z-index="68"><draw:image xlink:href="Pictures/10000001000003BA0000031D1F65A1F7.png" xlink:type="simple" xlink:show="embed" xlink:actuate="onLoad" draw:mime-type="image/png"/></draw:frame><text:soft-page-break/></text:p>
      <text:p text:style-name="P67"/>
      <text:p text:style-name="P68"/>
      <text:p text:style-name="P69">Esto es un <text:span text:style-name="T81">M</text:span><text:span text:style-name="T1">apa de calor</text:span> en escala logarítmica <text:span text:style-name="T82">decimal</text:span>. Es un método visual muy útil para representar <text:span text:style-name="T83">e interpretar la</text:span> matriz de frecuencias calculadas. Cada pixel representa la <text:span text:style-name="T1">probabilidad estimada de la transición</text:span> entre un carácter actual y un carácter siguiente. Mientras más claro sea el color, mayor es la probabilidad estimada.</text:p>
      <text:p text:style-name="P67"/>
      <text:p text:style-name="P67"/>
      <text:p text:style-name="P67"/>
      <text:p text:style-name="P69">Gracias a esta representación visual, <text:span text:style-name="T83">se puede</text:span> concluir claramente que hay una tendencia que marca el uso de transiciones de mayúsculas a minúsculas, <text:span text:style-name="T84">pero no de minúsculas a mayúsculas. También podemos ver un cuadrado </text:span><text:span text:style-name="T85">muy brillante</text:span><text:span text:style-name="T84"> de </text:span><text:span text:style-name="T86">10x10</text:span><text:span text:style-name="T84"> cerca del centro, el cual representa transiciones de número a número. Es decir, es muy común que </text:span><text:span text:style-name="T87">dentro de las contraseñas después de un número venga otro número.</text:span></text:p>
      <text:p text:style-name="P67"/>
      <text:p text:style-name="P67">Ya teniendo todo lo necesario, para cerrar con esta sección se van a mostrar unos ejemplos tomados directamente del script, el cual permite probar contraseñas y obtener su medida de información propia condicional promedio.</text:p>
      <text:p text:style-name="P70"/>
      <text:p text:style-name="P70"/>
      <text:p text:style-name="P71"/>
      <table:table table:name="Table2" table:style-name="Table2" table:template-name="Academic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72">Contraseña</text:p>
          </table:table-cell>
          <table:table-cell table:style-name="Table2.A1" office:value-type="string">
            <text:p text:style-name="P72">Impredictibilidad Secuencial</text:p>
          </table:table-cell>
        </table:table-row>
        <table:table-row>
          <table:table-cell table:style-name="Table2.A2" office:value-type="string">
            <text:p text:style-name="P72">steran</text:p>
          </table:table-cell>
          <table:table-cell table:style-name="Table2.B2" office:value-type="float" office:value="3.00869">
            <text:p text:style-name="P73">3.008690</text:p>
          </table:table-cell>
        </table:table-row>
        <table:table-row>
          <table:table-cell table:style-name="Table2.A2" office:value-type="string">
            <text:p text:style-name="P72">123456789</text:p>
          </table:table-cell>
          <table:table-cell table:style-name="Table2.B2" office:value-type="float" office:value="2.77817">
            <text:p text:style-name="P74">2.778170</text:p>
          </table:table-cell>
        </table:table-row>
        <table:table-row>
          <table:table-cell table:style-name="Table2.A2" office:value-type="string">
            <text:p text:style-name="P72">fIfIfIfI</text:p>
          </table:table-cell>
          <table:table-cell table:style-name="Table2.B2" office:value-type="float" office:value="11.0032">
            <text:p text:style-name="P74">11.003200</text:p>
          </table:table-cell>
        </table:table-row>
        <table:table-row>
          <table:table-cell table:style-name="Table2.A2" office:value-type="string">
            <text:p text:style-name="P72">a1b2c3d4</text:p>
          </table:table-cell>
          <table:table-cell table:style-name="Table2.B2" office:value-type="float" office:value="5.40569">
            <text:p text:style-name="P74">5.405690</text:p>
          </table:table-cell>
        </table:table-row>
        <table:table-row>
          <table:table-cell table:style-name="Table2.A2" office:value-type="string">
            <text:p text:style-name="P72">hello123</text:p>
          </table:table-cell>
          <table:table-cell table:style-name="Table2.B2" office:value-type="float" office:value="3.21326">
            <text:p text:style-name="P74">3.213260</text:p>
          </table:table-cell>
        </table:table-row>
        <table:table-row>
          <table:table-cell table:style-name="Table2.A2" office:value-type="string">
            <text:p text:style-name="P72">password</text:p>
          </table:table-cell>
          <table:table-cell table:style-name="Table2.B2" office:value-type="float" office:value="3.90468">
            <text:p text:style-name="P74">3.904680</text:p>
          </table:table-cell>
        </table:table-row>
        <table:table-row>
          <table:table-cell table:style-name="Table2.A8" office:value-type="string">
            <text:p text:style-name="P74">[7%?G.</text:p>
          </table:table-cell>
          <table:table-cell table:style-name="Table2.B8" office:value-type="float" office:value="9.80787">
            <text:p text:style-name="P74">9.807870</text:p>
          </table:table-cell>
        </table:table-row>
      </table:table>
      <text:p text:style-name="P75"/>
      <text:p text:style-name="P76"><text:span text:style-name="T88">Se observa que las contraseñas con transiciones de caracteres mas </text:span><text:span text:style-name="T89">extrañas estadísticamente</text:span><text:span text:style-name="T88">, son las que reciben un puntaje mayor de impredictibilidad secuencial. Y se concluye que es una medida </text:span><text:span text:style-name="T89">útil</text:span><text:span text:style-name="T88"> referente a </text:span><text:span text:style-name="T90">la predictibilidad de un</text:span><text:span text:style-name="T91">a cadena de</text:span><text:span text:style-name="T90"> texto, donde lo más común estadísticamente es mas esperable y por lo tanto más predecible.</text:span></text:p>
      <text:p text:style-name="P77"/>
      <text:p text:style-name="P77"/>
      <text:p text:style-name="P78"><text:span text:style-name="T92">ANÁLISIS</text:span><text:span text:style-name="T93"> DESCRIPTIV</text:span><text:span text:style-name="T92">O</text:span><text:span text:style-name="T93"> DE LAS </text:span>CONTRASEÑA<text:span text:style-name="T93">S</text:span></text:p>
      <text:p text:style-name="P78"/>
      <text:p text:style-name="P79">En esta sección se van a analizar las <text:span text:style-name="T94">6</text:span> características <text:span text:style-name="T95">de interés mencionadas anteriormente</text:span>, basándonos en el dataset recolectado de <text:span text:style-name="T37">230.000</text:span><text:span text:style-name="T96"> </text:span>contraseñas. Incluyendo sus respectivas medidas de impredictibilidad secuencial calculadas previamente.</text:p>
      <text:p text:style-name="P79"/>
      <text:p text:style-name="P80">Para cada <text:span text:style-name="T97">característica </text:span><text:span text:style-name="T98">con </text:span><text:span text:style-name="T99">valor</text:span><text:span text:style-name="T100"> discret</text:span><text:span text:style-name="T99">o</text:span><text:span text:style-name="T101"> </text:span>se va a indicar:</text:p>
      <text:p text:style-name="P80"/>
      <text:list text:style-name="L3">
        <text:list-item>
          <text:p text:style-name="P81">Gráfico de barras</text:p>
        </text:list-item>
        <text:list-item>
          <text:p text:style-name="P82">Valores de interés</text:p>
        </text:list-item>
        <text:list-item>
          <text:p text:style-name="P81">Conclusi<text:span text:style-name="T102">ones</text:span></text:p>
        </text:list-item>
      </text:list>
      <text:p text:style-name="P80"/>
      <text:p text:style-name="P83"><text:soft-page-break/>Se va a empezar por analizar la <text:span text:style-name="T1">longitud</text:span>. La cantidad de caracteres que tienen las contraseñas.</text:p>
      <text:p text:style-name="P83"/>
      <text:p text:style-name="P83"><draw:frame draw:style-name="fr1" draw:name="Image14" text:anchor-type="char" svg:x="-0.0717in" svg:y="0in" svg:width="3.5508in" svg:height="4.2035in" draw:z-index="71"><draw:image xlink:href="Pictures/10000001000002710000031D9DF4E782.png" xlink:type="simple" xlink:show="embed" xlink:actuate="onLoad" draw:mime-type="image/png"/></draw:frame></text:p>
      <text:p text:style-name="P84">Como podemos ver en el <text:span text:style-name="T103">diagrama</text:span><text:span text:style-name="T1"> de barras</text:span>. Hay una concentración muy alta de contraseñas con longitud <text:span text:style-name="T1">8</text:span>. Esto podría reflejar una mentalidad de <text:span text:style-name="T1">“mínimo esfuerzo para cumplir requisitos”</text:span>, debido a que las páginas web suelen imponer una mínima cantidad de caracteres necesaria para registrarse. A pesar de que no hay un estándar universal; gran parte de estos entornos virtuales suelen pedir como mínimo 8 caracteres en la contraseña, por cuestiones de seguridad.</text:p>
      <text:p text:style-name="P85"/>
      <text:p text:style-name="P85"/>
      <text:p text:style-name="P85"><draw:frame draw:style-name="fr4" draw:name="Image15" text:anchor-type="char" svg:x="5.8756in" svg:y="0.2508in" svg:width="0.9161in" svg:height="0.4075in" draw:z-index="72"><draw:image xlink:href="Pictures/10000001000001360000008AEDFD0C9D.png" xlink:type="simple" xlink:show="embed" xlink:actuate="onLoad" draw:mime-type="image/png"/></draw:frame></text:p>
      <text:p text:style-name="P86">Se obtiene el valor promedio o esperanza utilizando esta fórmula: <text:span text:style-name="T104">x <text:s text:c="14"/></text:span></text:p>
      <text:p text:style-name="P86">donde <text:span text:style-name="T1">h </text:span>representa la <text:span text:style-name="T1">frecuencia relativa</text:span> correspondiente a<draw:frame draw:style-name="fr4" draw:name="Image16" text:anchor-type="char" svg:x="5.3882in" svg:y="0.0654in" svg:width="0.1756in" svg:height="0.2189in" draw:z-index="73"><draw:image xlink:href="Pictures/100000010000003D000000478F1BBD14.png" xlink:type="simple" xlink:show="embed" xlink:actuate="onLoad" draw:mime-type="image/png"/></draw:frame> <text:span text:style-name="T104">x .</text:span><draw:frame draw:style-name="fr4" draw:name="Image17" text:anchor-type="char" svg:x="5.7661in" svg:y="0.2217in" svg:width="0.4626in" svg:height="0.3571in" draw:z-index="74"><draw:image xlink:href="Pictures/10000001000000C000000094F9456029.png" xlink:type="simple" xlink:show="embed" xlink:actuate="onLoad" draw:mime-type="image/png"/></draw:frame></text:p>
      <text:p text:style-name="P87">Mientras que la variabilidad se va a calcular con su coeficiente <text:s text:c="9"/>el cual representa al <text:span text:style-name="T1">desvío estándar</text:span> <text:span text:style-name="T105">comparado con el </text:span><text:span text:style-name="T106">promedio</text:span><text:span text:style-name="T104"> </text:span><text:span text:style-name="T107">de los datos</text:span><text:span text:style-name="T108">.</text:span></text:p>
      <text:p text:style-name="P88"><draw:frame draw:style-name="fr3" draw:name="Frame4" text:anchor-type="paragraph" svg:x="0.0362in" svg:y="0.139in" svg:width="2.4591in" draw:z-index="76"><draw:text-box fo:min-height="1.6736in"><table:table table:name="Table3" table:style-name="Table3" table:template-name="Default Style"><table:table-column table:style-name="Table3.A"/><table:table-column table:style-name="Table3.B"/><table:table-row><table:table-cell table:style-name="Table3.A1" office:value-type="string"><text:p text:style-name="P89">Media</text:p></table:table-cell><table:table-cell table:style-name="Table3.B1" office:value-type="string"><text:p text:style-name="P90">8.42099</text:p></table:table-cell></table:table-row><table:table-row table:style-name="Table3.2"><table:table-cell table:style-name="Table3.A2" office:value-type="string"><text:p text:style-name="P89">Moda</text:p></table:table-cell><table:table-cell table:style-name="Table3.B2" office:value-type="float" office:value="8"><text:p text:style-name="P91">8</text:p></table:table-cell></table:table-row><table:table-row table:style-name="Table3.2"><table:table-cell table:style-name="Table3.A2" office:value-type="string"><text:p text:style-name="P89">Mediana</text:p></table:table-cell><table:table-cell table:style-name="Table3.B2" office:value-type="float" office:value="8"><text:p text:style-name="P91">8</text:p></table:table-cell></table:table-row><table:table-row table:style-name="Table3.2"><table:table-cell table:style-name="Table3.A2" office:value-type="string"><text:p text:style-name="P89">Variabilidad</text:p></table:table-cell><table:table-cell table:style-name="Table3.B4" office:value-type="string"><text:p text:style-name="P91">24.482%</text:p></table:table-cell></table:table-row></table:table><text:p text:style-name="P92"/></draw:text-box></draw:frame></text:p>
      <text:p text:style-name="P92"><text:span text:style-name="T109">Se observa </text:span><text:span text:style-name="T110">una </text:span><text:span text:style-name="T111">cuasi-</text:span><text:span text:style-name="T110">simetría </text:span><text:span text:style-name="T112">Media </text:span><text:span text:style-name="T113">≈ </text:span><text:span text:style-name="T114">Moda </text:span><text:span text:style-name="T115">=</text:span><text:span text:style-name="T113"> </text:span><text:span text:style-name="T114">Mediana </text:span><text:span text:style-name="T116">y una variabilidad relativamente baja. Esto indica que </text:span><text:span text:style-name="T117">u</text:span><text:span text:style-name="T116">na longitud de 8 caracteres parece ser un estándar muy marcado y </text:span><text:span text:style-name="T118">predecible</text:span><text:span text:style-name="T116">.</text:span></text:p>
      <text:p text:style-name="P93"><text:soft-page-break/>Se va a analizar la presencia de letras en las contraseñas, tanto <text:span text:style-name="T1">mayúsculas</text:span> como <text:span text:style-name="T1">minúsculas</text:span> por separado.</text:p>
      <text:p text:style-name="P93"><draw:frame draw:style-name="fr1" draw:name="Image18" text:anchor-type="char" svg:x="3.661in" svg:y="0.0161in" svg:width="3.411in" svg:height="3.7252in" draw:z-index="78"><draw:image xlink:href="Pictures/100000010000028E0000031DDF926FCE.png" xlink:type="simple" xlink:show="embed" xlink:actuate="onLoad" draw:mime-type="image/png"/></draw:frame><draw:frame draw:style-name="fr1" draw:name="Image6" text:anchor-type="char" svg:x="-0.2874in" svg:y="0.0209in" svg:width="3.8311in" svg:height="3.7409in" draw:z-index="77"><draw:image xlink:href="Pictures/10000001000002E40000031D1866E7FD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draw:frame draw:style-name="fr3" draw:name="Frame6" text:anchor-type="paragraph" svg:x="-0.3075in" svg:y="0.1728in" svg:width="3.0528in" draw:z-index="79"><draw:text-box fo:min-height="1.6917in"><table:table table:name="Table6" table:style-name="Table6" table:template-name="Default Style"><table:table-column table:style-name="Table6.A"/><table:table-column table:style-name="Table6.B"/><table:table-column table:style-name="Table6.C"/><table:table-row table:style-name="Table6.1"><table:table-cell table:style-name="Table6.A1" office:value-type="string"><text:p text:style-name="P95"/></table:table-cell><table:table-cell table:style-name="Table6.A1" office:value-type="string"><text:p text:style-name="P95">Minúsculas</text:p></table:table-cell><table:table-cell table:style-name="Table6.C1" office:value-type="string"><text:p text:style-name="P95">Mayúsculas</text:p></table:table-cell></table:table-row><table:table-row table:style-name="Table6.1"><table:table-cell table:style-name="Table6.A2" office:value-type="string"><text:p text:style-name="P96">Media</text:p></table:table-cell><table:table-cell table:style-name="Table6.A2" office:value-type="string"><text:p text:style-name="P95">5.56091</text:p></table:table-cell><table:table-cell table:style-name="Table6.C2" office:value-type="string"><text:p text:style-name="P97">0.20820</text:p></table:table-cell></table:table-row><table:table-row table:style-name="Table6.1"><table:table-cell table:style-name="Table6.A2" office:value-type="string"><text:p text:style-name="P96">Moda</text:p></table:table-cell><table:table-cell table:style-name="Table6.B3" office:value-type="float" office:value="6"><text:p text:style-name="P95">6</text:p></table:table-cell><table:table-cell table:style-name="Table6.C3" office:value-type="float" office:value="0"><text:p text:style-name="P95">0</text:p></table:table-cell></table:table-row><table:table-row table:style-name="Table6.1"><table:table-cell table:style-name="Table6.A2" office:value-type="string"><text:p text:style-name="P96">Mediana</text:p></table:table-cell><table:table-cell table:style-name="Table6.B3" office:value-type="float" office:value="6"><text:p text:style-name="P95">6</text:p></table:table-cell><table:table-cell table:style-name="Table6.C3" office:value-type="float" office:value="0"><text:p text:style-name="P95">0</text:p></table:table-cell></table:table-row><table:table-row table:style-name="Table6.1"><table:table-cell table:style-name="Table6.A2" office:value-type="string"><text:p text:style-name="P96">Variabilidad</text:p></table:table-cell><table:table-cell table:style-name="Table6.A2" office:value-type="string"><text:p text:style-name="P95">51.250%</text:p></table:table-cell><table:table-cell table:style-name="Table6.C2" office:value-type="string"><text:p text:style-name="P98"><text:span text:style-name="T119">418</text:span>.4<text:span text:style-name="T119">75%</text:span></text:p></table:table-cell></table:table-row></table:table><text:p text:style-name="P92"/></draw:text-box></draw:frame></text:p>
      <text:p text:style-name="P99">El <text:span text:style-name="T1">coeficiente de variación</text:span> de las mayúsculas resulta tan elevado debido a la baja media de aparición de dicho tipo de caracteres. En ese contexto la variabilidad no nos da mucha información.</text:p>
      <text:p text:style-name="P99"/>
      <text:p text:style-name="P99"/>
      <text:p text:style-name="P99"><text:span text:style-name="T120">Sin embargo podemos concluir que como l</text:span><text:span text:style-name="T121">os 3 valores de tendencia central </text:span><text:span text:style-name="T120">se posiciona</text:span><text:span text:style-name="T121">n</text:span><text:span text:style-name="T120"> </text:span><text:span text:style-name="T121">cerca de</text:span><text:span text:style-name="T120"> </text:span><text:span text:style-name="T122">0</text:span><text:span text:style-name="T120">, </text:span><text:span text:style-name="T121">lo esperable es que las contraseñas prescindan de </text:span><text:span text:style-name="T120">letras mayúsculas </text:span><text:span text:style-name="T121">directamente</text:span><text:span text:style-name="T120">. En cambio con las minúsculas, se muestra cercanía entre la Media, Moda y Mediana, destacando el valor de </text:span><text:span text:style-name="T122">6</text:span><text:span text:style-name="T120"> minúsculas como una tendencia bastante marcada, pero con bastante dispersión hacia otros valores. No parece ser algo tan predecible.</text:span></text:p>
      <text:p text:style-name="P100"><text:soft-page-break/>Ahora se analiza la presencia de <text:span text:style-name="T1">números</text:span> <text:span text:style-name="T123">y </text:span><text:span text:style-name="T124">símbolos</text:span> en las contraseñas. <text:span text:style-name="T123">(Los símbolos en este contexto son caracteres diferentes a letras y números).</text:span></text:p>
      <text:p text:style-name="P100"><draw:frame draw:style-name="fr1" draw:name="Image19" text:anchor-type="char" svg:x="0.1138in" svg:y="0.1516in" svg:width="3.1728in" svg:height="3.9547in" draw:z-index="80"><draw:image xlink:href="Pictures/10000001000002360000031D74AD76F3.png" xlink:type="simple" xlink:show="embed" xlink:actuate="onLoad" draw:mime-type="image/png"/></draw:frame><draw:frame draw:style-name="fr1" draw:name="Image20" text:anchor-type="char" svg:x="3.5827in" svg:y="0.1528in" svg:width="2.4161in" svg:height="3.9846in" draw:z-index="81"><draw:image xlink:href="Pictures/10000001000001AA0000031DC66E9EB1.png" xlink:type="simple" xlink:show="embed" xlink:actuate="onLoad" draw:mime-type="image/png"/></draw:frame></text:p>
      <text:p text:style-name="P100"><text:s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1">En el diagrama de barras correspondiente a los símbolos, en el valor <text:span text:style-name="T1">0</text:span> el diagrama explota a más de <text:span text:style-name="T1">220.000</text:span> contraseñas. <text:span text:style-name="T121">Lo cual representa más del </text:span><text:span text:style-name="T125">95%</text:span><text:span text:style-name="T121"> del dataset.</text:span> Marcando una clara tendencia al desuso de este tipo de caracteres. Esto puede ser <text:span text:style-name="T121">causado por condiciones impuestas por las </text:span><text:span text:style-name="T126">propias</text:span><text:span text:style-name="T121"> páginas de registro, las cuales muchas veces no permiten utilizar </text:span><text:span text:style-name="T126">símbolos</text:span><text:span text:style-name="T121">.</text:span></text:p>
      <text:p text:style-name="P102"><draw:frame draw:style-name="fr3" draw:name="Frame5" text:anchor-type="paragraph" svg:x="0.0154in" svg:y="0.1811in" svg:width="2.6465in" draw:z-index="82"><draw:text-box fo:min-height="1.6917in"><table:table table:name="Table5" table:style-name="Table5" table:template-name="Default Style"><table:table-column table:style-name="Table5.A"/><table:table-column table:style-name="Table5.B"/><table:table-column table:style-name="Table5.C"/><table:table-row table:style-name="Table5.1"><table:table-cell table:style-name="Table5.A1" office:value-type="string"><text:p text:style-name="P95"/></table:table-cell><table:table-cell table:style-name="Table5.A1" office:value-type="string"><text:p text:style-name="P103">Números</text:p></table:table-cell><table:table-cell table:style-name="Table5.C1" office:value-type="string"><text:p text:style-name="P103">Símbolos</text:p></table:table-cell></table:table-row><table:table-row table:style-name="Table5.1"><table:table-cell table:style-name="Table5.A2" office:value-type="string"><text:p text:style-name="P96">Media</text:p></table:table-cell><table:table-cell table:style-name="Table5.A2" office:value-type="string"><text:p text:style-name="P103">2.62288</text:p></table:table-cell><table:table-cell table:style-name="Table5.C2" office:value-type="string"><text:p text:style-name="P104">0.028852</text:p></table:table-cell></table:table-row><table:table-row table:style-name="Table5.1"><table:table-cell table:style-name="Table5.A2" office:value-type="string"><text:p text:style-name="P96">Moda</text:p></table:table-cell><table:table-cell table:style-name="Table5.B3" office:value-type="float" office:value="2"><text:p text:style-name="P103">2</text:p></table:table-cell><table:table-cell table:style-name="Table5.C3" office:value-type="float" office:value="0"><text:p text:style-name="P103">0</text:p></table:table-cell></table:table-row><table:table-row table:style-name="Table5.1"><table:table-cell table:style-name="Table5.A2" office:value-type="string"><text:p text:style-name="P96">Mediana</text:p></table:table-cell><table:table-cell table:style-name="Table5.B3" office:value-type="float" office:value="2"><text:p text:style-name="P103">2</text:p></table:table-cell><table:table-cell table:style-name="Table5.C3" office:value-type="float" office:value="0"><text:p text:style-name="P95">0</text:p></table:table-cell></table:table-row><table:table-row table:style-name="Table5.1"><table:table-cell table:style-name="Table5.A2" office:value-type="string"><text:p text:style-name="P96">Variabilidad</text:p></table:table-cell><table:table-cell table:style-name="Table5.A2" office:value-type="string"><text:p text:style-name="P103">88.592%</text:p></table:table-cell><table:table-cell table:style-name="Table5.C2" office:value-type="string"><text:p text:style-name="P98"><text:span text:style-name="T126">747</text:span>.<text:span text:style-name="T126">515</text:span><text:span text:style-name="T119">%</text:span></text:p></table:table-cell></table:table-row></table:table><text:p text:style-name="P92"/></draw:text-box></draw:frame></text:p>
      <text:p text:style-name="P105">Respecto a los números. Vemos que lo común es utilizar una poca cantidad, lo esperado es un valor rondando los <text:span text:style-name="T1">2</text:span> números. Pero debido a que hay una variabilidad enorme <text:span text:style-name="T127">y mucha dispersión de comportamiento</text:span>, es la característica <text:span text:style-name="T1">más impredecible</text:span> hasta ahora.</text:p>
      <text:p text:style-name="P106"><text:soft-page-break/>Para terminar con el análisis descriptivo, se va a analizar la <text:span text:style-name="T1">impredictibilidad secuencial</text:span> de las contraseñas.</text:p>
      <text:p text:style-name="P106"><draw:frame draw:style-name="fr1" draw:name="Image21" text:anchor-type="char" svg:x="-0.3228in" svg:y="0.0992in" svg:width="4.4638in" svg:height="3.7193in" draw:z-index="83"><draw:image xlink:href="Pictures/10000001000002DF0000031D58E5C994.png" xlink:type="simple" xlink:show="embed" xlink:actuate="onLoad" draw:mime-type="image/png"/></draw:frame></text:p>
      <text:p text:style-name="P107">Este es un <text:span text:style-name="T1">Histograma </text:span>con intervalos de <text:span text:style-name="T1">0.2</text:span> de ancho. Indica la cantidad de contraseñas cuya medida de impredictibilidad pertenece al rango de cada intervalo.</text:p>
      <text:p text:style-name="P108"/>
      <text:p text:style-name="P107">Se observa que hay una tendencia central marcada, lo cual es buen indicativo de que la medida calculada es útil para catalogar a las contraseñas.</text:p>
      <text:p text:style-name="P108"/>
      <text:p text:style-name="P108"/>
      <text:p text:style-name="P109">Al ser una <text:span text:style-name="T1">variable continua</text:span>; cada valor de impredictibilidad secuencial es <text:span text:style-name="T1">único</text:span> y por lo tanto tiene la misma frecuencia que los demás. Esto provoca que la Moda deje de tener sentido para este análisis.</text:p>
      <text:p text:style-name="P109"><draw:frame draw:style-name="fr5" draw:name="Frame7" text:anchor-type="paragraph" svg:x="-0.3071in" svg:y="0.2063in" svg:width="2in" draw:z-index="84"><draw:text-box fo:min-height="1.6917in"><table:table table:name="Table7" table:style-name="Table7" table:template-name="Default Style"><table:table-column table:style-name="Table7.A"/><table:table-column table:style-name="Table7.B"/><table:table-row><table:table-cell table:style-name="Table7.A1" office:value-type="string"><text:p text:style-name="P96">Media</text:p></table:table-cell><table:table-cell table:style-name="Table7.B1" office:value-type="float" office:value="4.32428"><text:p text:style-name="P110">4.32428</text:p></table:table-cell></table:table-row><table:table-row table:style-name="Table7.2"><table:table-cell table:style-name="Table7.A2" office:value-type="string"><text:p text:style-name="P96">Mediana</text:p></table:table-cell><table:table-cell table:style-name="Table7.B2" office:value-type="float" office:value="4.17993"><text:p text:style-name="P110">4.17993</text:p></table:table-cell></table:table-row><table:table-row table:style-name="Table7.2"><table:table-cell table:style-name="Table7.A3" office:value-type="string"><text:p text:style-name="P96">Variabilidad</text:p></table:table-cell><table:table-cell table:style-name="Table7.B3" office:value-type="string"><text:p text:style-name="P110">18.685%</text:p></table:table-cell></table:table-row><table:table-row table:style-name="Table7.2"><table:table-cell table:style-name="Table7.A4" office:value-type="string"><text:p text:style-name="P111">Mínimo</text:p></table:table-cell><table:table-cell table:style-name="Table7.B4" office:value-type="string"><text:p text:style-name="P110">2.28994</text:p></table:table-cell></table:table-row><table:table-row table:style-name="Table7.2"><table:table-cell table:style-name="Table7.A5" office:value-type="string"><text:p text:style-name="P111">Máximo</text:p></table:table-cell><table:table-cell table:style-name="Table7.B5" office:value-type="string"><text:p text:style-name="P110">11.7577</text:p></table:table-cell></table:table-row></table:table><text:p text:style-name="P92"/></draw:text-box></draw:frame></text:p>
      <text:p text:style-name="P112">Se observa que la Media y la Mediana son cercanas, y que la variabilidad es <text:span text:style-name="T128">muy </text:span>baja. Esto muestra una tendencia clara <text:span text:style-name="T128">y predecible</text:span> pero difícil de interpretar debido a que la métrica no está normalizada.</text:p>
      <text:p text:style-name="P112"/>
      <text:p text:style-name="P113">Los valores mínimos y máximos en la tabla corresponden a <text:span text:style-name="T1">outliers</text:span> específicos, los cuales no pueden usarse como <text:span text:style-name="T1">límites teóricos</text:span> propios de la métrica. Sin embargo, se pueden utilizar para tener una referencia <text:span text:style-name="T1">relativa</text:span> de hasta donde <text:span text:style-name="T1">puede</text:span> llegar cuantitativamente.</text:p>
      <text:p text:style-name="P112"><draw:frame draw:style-name="fr1" draw:name="Image22" text:anchor-type="char" svg:x="-0.4016in" svg:y="0.1in" svg:width="3.2193in" svg:height="4.0689in" draw:z-index="85"><draw:image xlink:href="Pictures/10000001000002580000031D820D45FB.png" xlink:type="simple" xlink:show="embed" xlink:actuate="onLoad" draw:mime-type="image/png"/></draw:frame><text:soft-page-break/></text:p>
      <text:p text:style-name="P114">En este <text:span text:style-name="T1">Box Plot</text:span> se aprecia mejor el posicionamiento de los cuartiles y los outliers, así como los mínimos <text:s/>y máximos.</text:p>
      <text:p text:style-name="P114"/>
      <text:p text:style-name="P115">Se puede ver que hay muchos outliers y eso es porque incluso los casos <text:span text:style-name="T1">más improbables</text:span> se pueden llegar a repetir cientas de veces dado un dataset muy grande y abarcativo. </text:p>
      <text:p text:style-name="P115"/>
      <text:p text:style-name="P115"><text:span text:style-name="T129">L</text:span><text:span text:style-name="T130">a linea de outliers </text:span><text:span text:style-name="T131">casi</text:span><text:span text:style-name="T130"> recta que hay al rededor del valor </text:span><text:span text:style-name="T131">2.3 </text:span><text:span text:style-name="T132">parece</text:span><text:span text:style-name="T133"> </text:span><text:span text:style-name="T130">indica</text:span><text:span text:style-name="T132">r</text:span><text:span text:style-name="T130"> que la métrica tiene una </text:span><text:span text:style-name="T131">cota inferior </text:span><text:span text:style-name="T133">empírica observada</text:span><text:span text:style-name="T132"> </text:span><text:span text:style-name="T130">que no se pudo superar </text:span><text:span text:style-name="T132">por ninguna contraseña del dataset</text:span><text:span text:style-name="T130">.</text:span></text:p>
      <text:p text:style-name="P114"/>
      <text:p text:style-name="P114"/>
      <text:p text:style-name="P113">Basándose en los outliers, se puede afirmar que la impredictibilidad secuencial <text:span text:style-name="T1">puede</text:span> extenderse a valores mayores de <text:span text:style-name="T1">11</text:span>, pero no a valores menores de <text:span text:style-name="T1">2</text:span>. Sabiendo que el <text:span text:style-name="T1">50%</text:span> central de los datos ronda el valor <text:span text:style-name="T1">4</text:span> podemos dar una <text:span text:style-name="T1">interpretación relativa</text:span> de la métrica.</text:p>
      <text:p text:style-name="P114"/>
      <text:p text:style-name="P114"><text:span text:style-name="T129">E</text:span>sto indica que la información propia condicional promedio no suele ser <text:span text:style-name="T129">alta</text:span> en la <text:span text:style-name="T1">mayoría</text:span> de las contraseñas analizadas. <text:span text:style-name="T134">Lo cual muestra que la predictibilidad secuencial suele ser alta, </text:span><text:span text:style-name="T135">a</text:span><text:span text:style-name="T136">demás de ser poco variable.</text:span></text:p>
      <text:p text:style-name="P114"/>
      <text:p text:style-name="P116">Para terminar con esta sección del informe, se resume y concluye que las características más dispersas y variables son el uso de <text:span text:style-name="T1">minúsculas</text:span> y de <text:span text:style-name="T1">números</text:span>, mientras que las <text:span text:style-name="T1">mayúsculas</text:span> y <text:span text:style-name="T1">símbolos especiales</text:span> tienen muy poca presencia, y la <text:span text:style-name="T1">longitud</text:span> e <text:span text:style-name="T1">impredictibilidad secuencial</text:span> parecen ser más predecibles a causa de sus tendencias abruptas y baja dispersión.</text:p>
      <text:p text:style-name="P117"><text:soft-page-break/>RELACIÓN ENTRE <text:span text:style-name="T137">CARACTERÍSTICAS OBTENIDAS DE LAS </text:span>CONTRASEÑA<text:span text:style-name="T137">S</text:span></text:p>
      <text:p text:style-name="P118"/>
      <text:p text:style-name="P119">Para esta sección se va a estar realizando un estudio de <text:span text:style-name="T1">asociación entre variables</text:span>. Existen muchas <text:span text:style-name="T138">(15) </text:span>relaciones que podríamos analizar; longitud vs cantidad de minúsculas, cantidad de símbolos vs cantidad de números, etc... Sin embargo, y con el fin de no extender de más este informe, se va a analizar <text:span text:style-name="T43">solo </text:span><text:span text:style-name="T138">la relación entre cada una de las </text:span><text:span text:style-name="T139">5</text:span><text:span text:style-name="T138"> variables y la impredictibilidad secuencial</text:span>.</text:p>
      <text:p text:style-name="P119"/>
      <text:p text:style-name="P120">De este modo lo que se va a estar interpretando es la <text:span text:style-name="T1">influencia</text:span> que tienen sobre la impredictibilidad la aparición de diferentes tipos de caracteres como minúsculas, mayúsculas, números y símbolos, además de la propia longitud de las contraseñas.</text:p>
      <text:p text:style-name="P120"><text:s/></text:p>
      <text:p text:style-name="P120">Para cada una de las características, se va a graficar un <text:span text:style-name="T1">Dispersograma </text:span>posicionando puntos donde cada componente <text:span text:style-name="T1">X</text:span> corresponde a el valor de la métrica a comprar, mientras que cada componente <text:span text:style-name="T1">Y</text:span> corresponde al valor de impredictibilidad secuencial calculado para esa contraseña.</text:p>
      <text:p text:style-name="P121"/>
      <text:p text:style-name="P120">Luego se va a encontrar un <text:span text:style-name="T1">modelo lineal</text:span> que se ajuste lo mejor posible a los puntos de la muestra. Utilizando la siguiente fórmula <text:span text:style-name="T140">se va a calcular la suma residual de cuadrados entre los puntos y la recta:</text:span></text:p>
      <text:p text:style-name="P120"><draw:frame draw:style-name="fr6" draw:name="Frame8" text:anchor-type="paragraph" svg:x="-0.0083in" svg:y="0.1256in" svg:width="2.1063in" draw:z-index="89"><draw:text-box fo:min-height="0.7472in"><text:p text:style-name="P122"><draw:frame draw:style-name="fr4" draw:name="Image24 Copy 1" text:anchor-type="char" svg:x="0.0354in" svg:y="0.0602in" svg:width="1.7929in" svg:height="0.6882in" draw:z-index="90"><draw:image xlink:href="Pictures/10000001000002A8000000FA60D7D46A.png" xlink:type="simple" xlink:show="embed" xlink:actuate="onLoad" draw:mime-type="image/png"/></draw:frame></text:p></draw:text-box></draw:frame><draw:frame draw:style-name="fr4" draw:name="Image26" text:anchor-type="char" svg:x="6.772in" svg:y="0.2516in" svg:width="0.2327in" svg:height="0.3299in" draw:z-index="88"><draw:image xlink:href="Pictures/100000010000006C000000996FA52C4C.png" xlink:type="simple" xlink:show="embed" xlink:actuate="onLoad" draw:mime-type="image/png"/></draw:frame></text:p>
      <text:p text:style-name="P123">Donde<draw:frame draw:style-name="fr4" draw:name="Image25" text:anchor-type="char" svg:x="0.6634in" svg:y="0.0252in" svg:width="0.2661in" svg:height="0.3055in" draw:z-index="87"><draw:image xlink:href="Pictures/100000010000006B0000007B99E31BFD.png" xlink:type="simple" xlink:show="embed" xlink:actuate="onLoad" draw:mime-type="image/png"/></draw:frame><draw:frame draw:style-name="fr4" draw:name="Image27" text:anchor-type="char" svg:x="2.8902in" svg:y="0.0319in" svg:width="0.2283in" svg:height="0.2882in" draw:z-index="91"><draw:image xlink:href="Pictures/10000001000000670000008291E2533A.png" xlink:type="simple" xlink:show="embed" xlink:actuate="onLoad" draw:mime-type="image/png"/></draw:frame> Y representa el valor <text:span text:style-name="T141">observado y</text:span> Y representa el valor estimado por el modelo lineal.</text:p>
      <text:p text:style-name="P120"><draw:frame draw:style-name="fr3" draw:name="Frame9" text:anchor-type="paragraph" svg:x="-0.0547in" svg:y="0.2043in" svg:width="2.1264in" draw:z-index="92"><draw:text-box fo:min-height="0.9201in"><text:p text:style-name="P122"><draw:frame draw:style-name="fr1" draw:name="Image28 Copy 1" text:anchor-type="char" svg:x="0.0307in" svg:y="0.0819in" svg:width="0.8953in" svg:height="0.7071in" draw:z-index="93"><draw:image xlink:href="Pictures/10000000000001600000011695E42CB4.png" xlink:type="simple" xlink:show="embed" xlink:actuate="onLoad" draw:mime-type="image/png"/></draw:frame><draw:frame draw:style-name="fr1" draw:name="Image29 Copy 1" text:anchor-type="char" svg:x="1.0189in" svg:y="0.0811in" svg:width="0.9839in" svg:height="0.7008in" draw:z-index="94"><draw:image xlink:href="Pictures/1000000000000185000001154B049EE3.png" xlink:type="simple" xlink:show="embed" xlink:actuate="onLoad" draw:mime-type="image/png"/></draw:frame></text:p></draw:text-box></draw:frame></text:p>
      <text:p text:style-name="P124">Para minimizarlo, se resuelven las <text:span text:style-name="T1">ecuaciones normales</text:span> a partir de las derivadas parciales respecto a <text:span text:style-name="T142">la pendiente </text:span><text:span text:style-name="T143">a</text:span><text:span text:style-name="T142"> y respecto a la ordenada al origen </text:span><text:span text:style-name="T143">b</text:span><text:span text:style-name="T142">.</text:span></text:p>
      <text:p text:style-name="P124"><text:soft-page-break/><text:span text:style-name="T144">Se va a comenzar analizando la correlación entre la longitud y </text:span><text:span text:style-name="T145">la</text:span><text:span text:style-name="T144"> IPCP.</text:span></text:p>
      <text:p text:style-name="P125"><draw:frame draw:style-name="fr3" draw:name="Frame10" text:anchor-type="paragraph" svg:x="-0.2563in" svg:y="4.3327in" svg:width="2.3244in" draw:z-index="95"><draw:text-box fo:min-height="1.289in"><table:table table:name="Table9" table:style-name="Table9" table:template-name="Default Style"><table:table-column table:style-name="Table9.A"/><table:table-column table:style-name="Table9.B"/><table:table-row table:style-name="Table9.1"><table:table-cell table:style-name="Table9.A1" office:value-type="string"><text:p text:style-name="P126">Pendiente</text:p></table:table-cell><table:table-cell table:style-name="Table9.B1" office:value-type="string"><text:p text:style-name="P127">0.00258</text:p></table:table-cell></table:table-row><table:table-row table:style-name="Table9.2"><table:table-cell table:style-name="Table9.A2" office:value-type="string"><text:p text:style-name="P126">Ordenada</text:p></table:table-cell><table:table-cell table:style-name="Table9.B2" office:value-type="string"><text:p text:style-name="P127">4.30297</text:p></table:table-cell></table:table-row><table:table-row table:style-name="Table9.1"><table:table-cell table:style-name="Table9.A2" office:value-type="string"><text:p text:style-name="P126">Correlación</text:p></table:table-cell><table:table-cell table:style-name="Table9.B2" office:value-type="string"><text:p text:style-name="P127">0.00659</text:p></table:table-cell></table:table-row></table:table><text:p text:style-name="P128"/></draw:text-box></draw:frame><draw:frame draw:style-name="fr7" draw:name="Image23" text:anchor-type="char" svg:x="-0.0547in" svg:y="0.1827in" svg:width="7.1346in" svg:height="4.0457in" draw:z-index="86"><draw:image xlink:href="Pictures/10000001000005080000031D33A6DF32.png" xlink:type="simple" xlink:show="embed" xlink:actuate="onLoad" draw:mime-type="image/png"/></draw:frame><draw:frame draw:style-name="fr4" draw:name="Image31" text:anchor-type="char" svg:x="5.1453in" svg:y="4.1756in" svg:width="0.6874in" svg:height="0.4571in" draw:z-index="96"><draw:image xlink:href="Pictures/100000010000016F000000F464E93977.png" xlink:type="simple" xlink:show="embed" xlink:actuate="onLoad" draw:mime-type="image/png"/></draw:frame><text:span text:style-name="T146">E</text:span>l <text:span text:style-name="T1">Coeficiente de correlación </text:span><text:s text:c="13"/><text:span text:style-name="T146">sirve para medir </text:span><text:span text:style-name="T147">qué tan consistentemente</text:span></text:p>
      <text:p text:style-name="P129">las desviaciones respecto a la media ocurren en el mismo sentido<text:span text:style-name="T146">. A</text:span><text:span text:style-name="T148">quí</text:span><draw:frame draw:style-name="fr4" draw:name="Image32" text:anchor-type="char" svg:x="4.0736in" svg:y="0.3457in" svg:width="0.3937in" svg:height="0.1992in" draw:z-index="97"><draw:image xlink:href="Pictures/10000001000000B20000005A4A6EFFB3.png" xlink:type="simple" xlink:show="embed" xlink:actuate="onLoad" draw:mime-type="image/png"/></draw:frame><text:span text:style-name="T148"> <text:s text:c="8"/></text:span><text:span text:style-name="T146">es la covarianza </text:span><text:span text:style-name="T149">y</text:span><text:span text:style-name="T146"> <text:s text:c="8"/>son los </text:span><text:span text:style-name="T148">desvíos de X e Y</text:span><draw:frame draw:style-name="fr4" draw:name="Image33" text:anchor-type="char" svg:x="6.161in" svg:y="0.3098in" svg:width="0.4409in" svg:height="0.252in" draw:z-index="98"><draw:image xlink:href="Pictures/10000001000000E700000084CF9754BB.png" xlink:type="simple" xlink:show="embed" xlink:actuate="onLoad" draw:mime-type="image/png"/></draw:frame><text:span text:style-name="T148">.</text:span></text:p>
      <text:p text:style-name="P130"/>
      <text:p text:style-name="P131">Se observa una asociación lineal <text:span text:style-name="T1">prácticamente nula</text:span> entre ambas variables. El coeficiente de correlación coincide con lo que muestra el dispersograma. <text:span text:style-name="T150">Además la ordenada al origen es </text:span><text:span text:style-name="T151">casi</text:span><text:span text:style-name="T150"> coincidente con el </text:span><text:span text:style-name="T151">valor promedio </text:span><text:span text:style-name="T150">de </text:span><text:span text:style-name="T145">la </text:span><text:span text:style-name="T150">IPCP que se obtuvo en la sección anterior. Esto indica que el modelo obtenido asume un valor de IPCP prácticamente constante para cualquier longitud. Lo cual da a entender que la longitud </text:span><text:span text:style-name="T151">no va a dar información</text:span><text:span text:style-name="T150"> para explicar o predecir la impredictibilidad secuencial.</text:span></text:p>
      <text:p text:style-name="P132"><text:soft-page-break/>Se realiza la regresión lineal comparando la cantidad de letras (minúsculas y mayúsculas) con el valor de impredictibilidad secuencial.</text:p>
      <text:p text:style-name="P132"/>
      <text:p text:style-name="P132"><draw:frame draw:style-name="fr3" draw:name="Frame11" text:anchor-type="paragraph" svg:x="-0.1098in" svg:y="2.9402in" svg:width="2.9173in" draw:z-index="101"><draw:text-box fo:min-height="1.4181in"><table:table table:name="Table10" table:style-name="Table10" table:template-name="Default Style"><table:table-column table:style-name="Table10.A"/><table:table-column table:style-name="Table10.B"/><table:table-column table:style-name="Table10.C"/><table:table-row table:style-name="Table10.1"><table:table-cell table:style-name="Table10.A1" office:value-type="string"><text:p text:style-name="P133"/></table:table-cell><table:table-cell table:style-name="Table10.A1" office:value-type="string"><text:p text:style-name="P134">Minúsculas</text:p></table:table-cell><table:table-cell table:style-name="Table10.C1" office:value-type="string"><text:p text:style-name="P134">Mayúsculas</text:p></table:table-cell></table:table-row><table:table-row table:style-name="Table10.1"><table:table-cell table:style-name="Table10.A2" office:value-type="string"><text:p text:style-name="P134">Pendiente</text:p></table:table-cell><table:table-cell table:style-name="Table10.A2" office:value-type="string"><text:p text:style-name="P133">0.35099</text:p></table:table-cell><table:table-cell table:style-name="Table10.C2" office:value-type="string"><text:p text:style-name="P133">-0.00348</text:p></table:table-cell></table:table-row><table:table-row table:style-name="Table10.3"><table:table-cell table:style-name="Table10.A2" office:value-type="string"><text:p text:style-name="P134">Ordenada</text:p></table:table-cell><table:table-cell table:style-name="Table10.A2" office:value-type="string"><text:p text:style-name="P133">4.25148</text:p></table:table-cell><table:table-cell table:style-name="Table10.C2" office:value-type="string"><text:p text:style-name="P133">4.34408</text:p></table:table-cell></table:table-row><table:table-row table:style-name="Table10.4"><table:table-cell table:style-name="Table10.A2" office:value-type="string"><text:p text:style-name="P134">Correlación</text:p></table:table-cell><table:table-cell table:style-name="Table10.A2" office:value-type="string"><text:p text:style-name="P133">0.37904</text:p></table:table-cell><table:table-cell table:style-name="Table10.C2" office:value-type="string"><text:p text:style-name="P133">-0.01226</text:p></table:table-cell></table:table-row></table:table><text:p text:style-name="P135"/></draw:text-box></draw:frame><draw:frame draw:style-name="fr1" draw:name="Image30" text:anchor-type="char" svg:x="-0.3425in" svg:y="0in" svg:width="3.839in" svg:height="2.8075in" draw:z-index="99"><draw:image xlink:href="Pictures/10000001000002E10000021BBA330F20.png" xlink:type="simple" xlink:show="embed" xlink:actuate="onLoad" draw:mime-type="image/png"/></draw:frame><draw:frame draw:style-name="fr1" draw:name="Image34" text:anchor-type="char" svg:x="3.4957in" svg:y="0in" svg:width="3.839in" svg:height="2.8075in" draw:z-index="100"><draw:image xlink:href="Pictures/10000001000002E10000021B5CE047DB.png" xlink:type="simple" xlink:show="embed" xlink:actuate="onLoad" draw:mime-type="image/png"/></draw:frame></text:p>
      <text:p text:style-name="P136">Para el modelo que relaciona las mayúsculas, vemos que el caso es prácticamente idéntico al de la longitud. No hay casi correlación entre las variables.</text:p>
      <text:p text:style-name="P136"/>
      <text:p text:style-name="P136"/>
      <text:p text:style-name="P136">Sin embargo en el modelo que relaciona las minúsculas se puede ver una recta creciente y un coeficiente correlación relativamente alto en comparación a las demás métricas. Aún así sigue siendo bajo respecto a <text:span text:style-name="T152">su</text:span> valor máximo.</text:p>
      <text:p text:style-name="P136"/>
      <text:p text:style-name="P136">La <text:span text:style-name="T1">pendiente positiva</text:span> indica que mientras mayor cantidad de letras minúsculas, mayor va a ser la impredictibilidad secuencial. Eso es lo que indica el modelo predictivo, el cual es <text:span text:style-name="T1">muy poco certero</text:span> en su ajuste. Se concluye que el uso de letras tampoco aporta mucha información respecto a <text:span text:style-name="T153">la</text:span> IPCP.</text:p>
      <text:p text:style-name="P136"><text:soft-page-break/>Por ultimo, y para finalizar esta sección. Se va a realizar el estudio de asociación entre números, símbolos y la impredictibilidad.</text:p>
      <text:p text:style-name="P136"/>
      <text:p text:style-name="P136"><draw:frame draw:style-name="fr1" draw:name="Image35" text:anchor-type="char" svg:x="-0.311in" svg:y="0in" svg:width="3.839in" svg:height="2.8075in" draw:z-index="102"><draw:image xlink:href="Pictures/10000001000002E10000021BB8B1C728.png" xlink:type="simple" xlink:show="embed" xlink:actuate="onLoad" draw:mime-type="image/png"/></draw:frame><draw:frame draw:style-name="fr1" draw:name="Image36" text:anchor-type="char" svg:x="3.5272in" svg:y="0in" svg:width="3.839in" svg:height="2.8075in" draw:z-index="103"><draw:image xlink:href="Pictures/10000001000002E10000021BCBA61703.png" xlink:type="simple" xlink:show="embed" xlink:actuate="onLoad" draw:mime-type="image/png"/></draw:frame><text:s text:c="25"/></text:p>
      <text:p text:style-name="P137"><draw:frame draw:style-name="fr3" draw:name="Frame12" text:anchor-type="paragraph" svg:x="-0.1929in" svg:y="2.8744in" svg:width="2.9173in" draw:z-index="104"><draw:text-box fo:min-height="1.7311in"><table:table table:name="Table8" table:style-name="Table8" table:template-name="Default Style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P133"/></table:table-cell><table:table-cell table:style-name="Table8.A1" office:value-type="string"><text:p text:style-name="P138">Números</text:p></table:table-cell><table:table-cell table:style-name="Table8.C1" office:value-type="string"><text:p text:style-name="P138">Símbolos</text:p></table:table-cell></table:table-row><table:table-row table:style-name="Table8.1"><table:table-cell table:style-name="Table8.A2" office:value-type="string"><text:p text:style-name="P134">Pendiente</text:p></table:table-cell><table:table-cell table:style-name="Table8.A2" office:value-type="string"><text:p text:style-name="P133">-0.04751</text:p></table:table-cell><table:table-cell table:style-name="Table8.C2" office:value-type="string"><text:p text:style-name="P133">0.59789</text:p></table:table-cell></table:table-row><table:table-row table:style-name="Table8.3"><table:table-cell table:style-name="Table8.A2" office:value-type="string"><text:p text:style-name="P134">Ordenada</text:p></table:table-cell><table:table-cell table:style-name="Table8.A2" office:value-type="string"><text:p text:style-name="P133">4.44936</text:p></table:table-cell><table:table-cell table:style-name="Table8.C2" office:value-type="string"><text:p text:style-name="P133">4.30746</text:p></table:table-cell></table:table-row><table:table-row table:style-name="Table8.4"><table:table-cell table:style-name="Table8.A2" office:value-type="string"><text:p text:style-name="P134">Correlación</text:p></table:table-cell><table:table-cell table:style-name="Table8.A2" office:value-type="string"><text:p text:style-name="P133">-0.13646</text:p></table:table-cell><table:table-cell table:style-name="Table8.C2" office:value-type="string"><text:p text:style-name="P133">0.15941</text:p></table:table-cell></table:table-row></table:table><text:p text:style-name="P135"/></draw:text-box></draw:frame>En ambos casos se observa una pronunciación en las pendientes. En el caso de los números, el modelo lineal indica que a mayor cantidad de números, menor impredictibilidad secuencial va a tener la contraseña. Mientras que el modelo que relaciona a los símbolos, indica un <text:span text:style-name="T1">aumento significativo</text:span> por cada carácter especial que se utilice.</text:p>
      <text:p text:style-name="P137"/>
      <text:p text:style-name="P137">En ambos casos el coeficiente de correlación indica un ajuste <text:span text:style-name="T1">muy pobre</text:span>. Y es que este estudio de asociación entre variables da a entender algo muy claro e irónico: <text:span text:style-name="T1">“La medida impredictibilidad secuencial es muy impredecible”</text:span>. Al menos en relación a estas cantidades discretas tan superficiales. <text:span text:style-name="T145">La</text:span> IPCP se basa en transiciones entre <text:span text:style-name="T152">pares de </text:span>caracteres, no <text:span text:style-name="T152">se guía principalmente por</text:span> la cantidad de veces que estos aparecen <text:span text:style-name="T152">individualmente</text:span>.</text:p>
      <text:p text:style-name="P137"/>
      <text:p text:style-name="P137"/>
      <text:p text:style-name="P139"><text:soft-page-break/>Como observación extra agregada a esta sección, se consideró informativo incluir una comparación entre <text:span text:style-name="T1">sub-datasets</text:span><text:span text:style-name="T1"> condicionados por la IPCP</text:span>. Es decir, tomar <text:span text:style-name="T1">1.000</text:span> contraseñas del dataset con IPCP mayor a <text:span text:style-name="T154">8.6</text:span> y hacer un conteo de cada tipo de carácter, y luego hacer lo mismo para 1.000 contraseñas con IPCP menor a <text:span text:style-name="T1">4.</text:span><text:span text:style-name="T154">3</text:span>. De este modo comparamos directamente la composición de contraseñas muy impredecibles y contraseñas muy predecibles secuencialmente.</text:p>
      <text:p text:style-name="P139"/>
      <text:p text:style-name="P140">Dado que el dataset original no contiene tal cantidad de claves para cada intervalo de IPCP extrema, se van a generar contraseñas nuevas <text:span text:style-name="T155">de longitud </text:span><text:span text:style-name="T154">8</text:span><text:span text:style-name="T155"> </text:span>en base a la matriz de probabilidades secuenciales, las cuales van a mantener la misma lógica de transiciones y rasgos generales del dataset original.</text:p>
      <text:p text:style-name="P140"><draw:frame draw:style-name="fr3" draw:name="Frame13" text:anchor-type="paragraph" svg:x="4.389in" svg:y="0.2535in" svg:width="1.702in" draw:z-index="106"><draw:text-box fo:min-height="0.3846in"><text:p text:style-name="P141">IPCP &lt; 4.3</text:p></draw:text-box></draw:frame><draw:frame draw:style-name="fr3" draw:name="Frame14" text:anchor-type="paragraph" svg:x="1.0346in" svg:y="0.2535in" svg:width="1.702in" draw:z-index="107"><draw:text-box fo:min-height="0.3846in"><text:p text:style-name="P141">IPCP &gt; 8.6</text:p></draw:text-box></draw:frame></text:p>
      <text:p text:style-name="P140"/>
      <text:p text:style-name="P140"><draw:frame draw:style-name="fr1" draw:name="Image37" text:anchor-type="char" svg:x="0in" svg:y="0.1264in" svg:width="6.9252in" svg:height="2.3402in" draw:z-index="105"><draw:image xlink:href="Pictures/10000001000006AE000002427B239BAB.png" xlink:type="simple" xlink:show="embed" xlink:actuate="onLoad" draw:mime-type="image/png"/></draw:frame></text:p>
      <text:p text:style-name="P142">Se observa que las contraseñas con IPCP alta tienen <text:span text:style-name="T1">mayor variedad</text:span> de <text:s/>caracteres. Mientras que las contraseñas con IPCP baja se componen prácticamente <text:span text:style-name="T1">solo</text:span> de números en su mayoría. <text:span text:style-name="T156">Esto se debe a que, c</text:span>omo vimos antes, las probabilidades mas altas están en las transiciones de número a número. <text:span text:style-name="T156">Esto puede dar un indicio de cómo se debe componer una contraseña para ser mas impredecible secuencialmente.</text:span></text:p>
      <text:p text:style-name="P143"><text:soft-page-break/>CONCLUSIONES FINALES</text:p>
      <text:p text:style-name="P143"/>
      <text:p text:style-name="P144">Para concluir este informe. Se van a resumir las conclusiones que se observaron a lo largo de las diferentes secciones.</text:p>
      <text:p text:style-name="P144"/>
      <text:p text:style-name="P144">Existen muchísimas maneras de pensar una contraseña. Hay tendencias que indican <text:span text:style-name="T1">factores externos</text:span> que imponen condiciones necesarias para el registro de una cuenta. Pero mas allá de eso también se pudo observar que existen <text:span text:style-name="T1">patrones estructurales</text:span> propios del lenguaje y la coherencia visual.</text:p>
      <text:p text:style-name="P144"/>
      <text:p text:style-name="P145">Esto se observó en el <text:span text:style-name="T1">mapa de calor</text:span> que indica probabilidades para cada transición entre posibles caracteres. Se vio que es <text:span text:style-name="T1">más común</text:span> pasar de mayúsculas a minúsculas que de minúsculas a mayúsculas (Regla gramatical), pasar de un número a otro número (Números de varios dígitos), etc... </text:p>
      <text:p text:style-name="P144"/>
      <text:p text:style-name="P144">Las contraseñas <text:span text:style-name="T157">analizadas en su mayoría contienen principalmente letras </text:span><text:span text:style-name="T158">minúsculas</text:span><text:span text:style-name="T157"> y </text:span><text:span text:style-name="T158">números</text:span><text:span text:style-name="T157">. No suelen ser ni muy cortas ni muy largas, rondan una longitud de </text:span><text:span text:style-name="T158">8</text:span><text:span text:style-name="T157"> caracteres. Es raro que contengan </text:span><text:span text:style-name="T158">caracteres especiales</text:span><text:span text:style-name="T157"> o </text:span><text:span text:style-name="T158">letras mayúsculas</text:span><text:span text:style-name="T157">.</text:span></text:p>
      <text:p text:style-name="P144"/>
      <text:p text:style-name="P145">Además de todo lo anterior. Se estima que una contraseña <text:span text:style-name="T145">promedio</text:span> es <text:span text:style-name="T1">bastante predecible secuencialmente</text:span>. Lo <text:span text:style-name="T159">que</text:span> significa que se compone de transiciones muy comunes entre caracteres. <text:span text:style-name="T145">Siendo la IPCP una métrica que se basa en un dataset de </text:span><text:span text:style-name="T160">230.000</text:span><text:span text:style-name="T145"> contraseñas, pero que aún así, no se relaciona </text:span><text:span text:style-name="T161">linealmente</text:span><text:span text:style-name="T145"> con la cantidad especifica de caracteres de una especifica naturaleza, ni tampoco con la longitud de la clave.</text:span></text:p>
      <text:p text:style-name="P145"/>
      <text:p text:style-name="P145"/>
      <text:p text:style-name="P145"/>
      <text:p text:style-name="P146"><text:soft-page-break/>HERRAMIENTAS Y FUENTES</text:p>
      <text:p text:style-name="P146"/>
      <text:p text:style-name="P147">Dataset utilizado (Collection #1)</text:p>
      <text:p text:style-name="P147"/>
      <text:p text:style-name="P148">Sección <text:span text:style-name="T162">analizada (230 archivos TXT)</text:span>:</text:p>
      <text:p text:style-name="P148"><text:a xlink:type="simple" xlink:href="https://github.com/v1ewp0rt/garbage/tree/main/FICH/TP_PyE2026/dataset" text:style-name="Internet_20_link" text:visited-style-name="Visited_20_Internet_20_Link">https://github.com/v1ewp0rt/garbage/tree/main/FICH/TP_PyE2026/dataset</text:a></text:p>
      <text:p text:style-name="P148"/>
      <text:p text:style-name="P149">Extracción de características (<text:span text:style-name="T163">CSV </text:span>generado a partir del dataset original):</text:p>
      <text:p text:style-name="P149"><text:a xlink:type="simple" xlink:href="https://github.com/v1ewp0rt/garbage/blob/main/FICH/TP_PyE2026/generado/dataset.csv" text:style-name="Internet_20_link" text:visited-style-name="Visited_20_Internet_20_Link">https://github.com/v1ewp0rt/garbage/blob/main/FICH/TP_PyE2026/generado/dataset.csv</text:a></text:p>
      <text:p text:style-name="P149"/>
      <text:p text:style-name="P150"><text:span text:style-name="T164">Colección completa</text:span> (Fuente desconocida, <text:span text:style-name="T162">39GB</text:span>):</text:p>
      <text:p text:style-name="P151"><text:a xlink:type="simple" xlink:href="magnet:?xt=urn:btih:b39c603c7e18db8262067c5926e7d5ea5d20e12e&amp;dn=Collection+1" text:style-name="Internet_20_link" text:visited-style-name="Visited_20_Internet_20_Link">magnet:?xt=urn:btih:b39c603c7e18db8262067c5926e7d5ea5d20e12e&amp;dn=Collection+1</text:a></text:p>
      <text:p text:style-name="P149"/>
      <text:p text:style-name="P152">Código utilizado</text:p>
      <text:p text:style-name="P152"/>
      <text:p text:style-name="P153">Script C++<text:span text:style-name="T165">:</text:span></text:p>
      <text:p text:style-name="P153"><text:a xlink:type="simple" xlink:href="https://github.com/v1ewp0rt/garbage/blob/main/FICH/TP_PyE2026/main.cpp" text:style-name="Internet_20_link" text:visited-style-name="Visited_20_Internet_20_Link">https://github.com/v1ewp0rt/garbage/blob/main/FICH/TP_PyE2026/main.cpp</text:a></text:p>
      <text:p text:style-name="P153"/>
      <text:p text:style-name="P154">Este código <text:span text:style-name="T166">fue escrito manualmente por el autor y </text:span>se encarga de las siguientes operaciones:</text:p>
      <text:p text:style-name="P154"/>
      <text:list text:style-name="List_20_1">
        <text:list-item>
          <text:list>
            <text:list-item>
              <text:p text:style-name="P155">Carga equidistante de contraseñas de la colección</text:p>
            </text:list-item>
            <text:list-item>
              <text:p text:style-name="P155">Cálculo de probabilidades secuenciales</text:p>
            </text:list-item>
            <text:list-item>
              <text:p text:style-name="P155">Generación de archivo <text:span text:style-name="T166">TXT </text:span>de contraseñas seleccionadas</text:p>
            </text:list-item>
            <text:list-item>
              <text:p text:style-name="P155">Generación de archivo <text:span text:style-name="T166">DAT con </text:span>matriz para <text:span text:style-name="T166">el M</text:span>apa de calor</text:p>
            </text:list-item>
            <text:list-item>
              <text:p text:style-name="P155">Recolección de características para cada contraseña cargada</text:p>
            </text:list-item>
            <text:list-item>
              <text:p text:style-name="P155">Cálculo de Información propia condicional promedio</text:p>
            </text:list-item>
            <text:list-item>
              <text:p text:style-name="P155">Generación de archivos DAT para Diagramas de barras</text:p>
            </text:list-item>
            <text:list-item>
              <text:p text:style-name="P155">Generación de archivos DAT para Histogramas, Box Plot y Dispersogramas</text:p>
            </text:list-item>
            <text:list-item>
              <text:p text:style-name="P155">Generación de archivos CSV con tablas para el análisis descriptivo</text:p>
            </text:list-item>
            <text:list-item>
              <text:p text:style-name="P155">Generación de archivo CSV de correlaciones para las tablas de regresión</text:p>
            </text:list-item>
            <text:list-item>
              <text:p text:style-name="P156">Generación de dataset CSV completo</text:p>
            </text:list-item>
            <text:list-item>
              <text:p text:style-name="P157">Demostración interactiva de la IPCP para contraseñas ingresadas manualmente</text:p>
            </text:list-item>
          </text:list>
        </text:list-item>
      </text:list>
      <text:p text:style-name="P1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AR"/>
    </style:style>
    <style:style style:name="MP2" style:family="paragraph" style:parent-style-name="Footer">
      <style:paragraph-properties fo:text-align="center" style:justify-single-word="false"/>
      <style:text-properties fo:language="es" fo:country="AR" officeooo:rsid="003580d6" officeooo:paragraph-rsid="003580d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 Copy 1 Copy 2 Copy 1" text:anchor-type="char" svg:x="6.1665in" svg:y="-0.7339in" svg:width="1.4465in" svg:height="1.5563in" draw:z-index="22"><draw:image xlink:href="Pictures/10000001000001B2000001D37E6385CC.png" xlink:type="simple" xlink:show="embed" xlink:actuate="onLoad" draw:mime-type="image/png"/></draw:frame><draw:frame draw:style-name="Mfr1" draw:name="Image2 Copy 1 Copy 2 Copy 1" text:anchor-type="char" svg:x="2.8134in" svg:y="-0.7661in" svg:width="1.4866in" svg:height="1.5563in" draw:z-index="42"><draw:image xlink:href="Pictures/10000001000001BE000001D382D83970.png" xlink:type="simple" xlink:show="embed" xlink:actuate="onLoad" draw:mime-type="image/png"/></draw:frame><draw:frame draw:style-name="Mfr1" draw:name="Image1 Copy 1 Copy 2 Copy 1" text:anchor-type="char" svg:x="-0.6098in" svg:y="-0.1874in" svg:width="3.0098in" svg:height="0.5193in" draw:z-index="62"><draw:image xlink:href="Pictures/10000001000003870000009C625A8996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0T15:39:52.357142577</meta:creation-date>
    <dc:date>2026-06-03T23:38:25.965952464</dc:date>
    <meta:editing-duration>P1DT6H49M47S</meta:editing-duration>
    <meta:editing-cycles>156</meta:editing-cycles>
    <meta:generator>LibreOffice/25.8.6.2$Linux_X86_64 LibreOffice_project/580$Build-2</meta:generator>
    <meta:document-statistic meta:table-count="10" meta:image-count="37" meta:object-count="0" meta:page-count="20" meta:paragraph-count="425" meta:word-count="3591" meta:character-count="22025" meta:non-whitespace-character-count="18765"/>
  </office:meta>
</office:document-meta>
</file>